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6dd85" officeooo:paragraph-rsid="0006dd85" style:font-weight-asian="bold" style:font-weight-complex="bold"/>
    </style:style>
    <style:style style:name="P2" style:family="paragraph" style:parent-style-name="Text_20_body">
      <style:text-properties officeooo:rsid="00065b51" officeooo:paragraph-rsid="00065b51"/>
    </style:style>
    <style:style style:name="P3" style:family="paragraph" style:parent-style-name="Text_20_body">
      <style:text-properties officeooo:rsid="00065b51" officeooo:paragraph-rsid="0006dd85"/>
    </style:style>
    <style:style style:name="P4" style:family="paragraph" style:parent-style-name="Text_20_body">
      <style:text-properties officeooo:rsid="0006dd85" officeooo:paragraph-rsid="0006dd85"/>
    </style:style>
    <style:style style:name="P5" style:family="paragraph" style:parent-style-name="Text_20_body">
      <style:text-properties officeooo:paragraph-rsid="00080dd7"/>
    </style:style>
    <style:style style:name="T1" style:family="text">
      <style:text-properties officeooo:rsid="0006dd85"/>
    </style:style>
    <style:style style:name="T2" style:family="text">
      <style:text-properties officeooo:rsid="00080dd7"/>
    </style:style>
    <style:style style:name="T3" style:family="text">
      <style:text-properties officeooo:rsid="00065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hode merise</text:p>
      <text:p text:style-name="P2">Une application permet de gérer une plateforme de streaming.<text:line-break/>Les utilisateurs de la plateforme peuvent constituer plusieurs playlists s’ils le souhaitent, dans lesquelles ils peuvent placer les musiques de leur choix.</text:p>
      <text:p text:style-name="P2"/>
      <text:p text:style-name="P3"><text:span text:style-name="T1">1) </text:span>En utilisant la méthode Merise, construire le MC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) Que veut dire MCD ? Que représente-<text:span text:style-name="T2">t-</text:span>il ?</text:p>
      <text:p text:style-name="P3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4">3) Que veut dire MLD ? Que représente-<text:span text:style-name="T2">t-</text:span>il ?</text:p>
      <text:p text:style-name="P3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5"><text:span text:style-name="T1">4) </text:span>Écrire<text:span text:style-name="T1"> </text:span><text:span text:style-name="T3">le MLD textuel</text:span></text:p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"><text:span text:style-name="T1">5) Schématiser le </text:span>MLD de cette applicati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6) Quel est le dernier schéma de la méthode Merise ? Que représente-<text:span text:style-name="T2">t-</text:span>il ?</text:p>
      <text:p text:style-name="P3">…………………………………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23:40:51.852170524</meta:creation-date>
    <dc:date>2026-06-25T00:04:49.096574908</dc:date>
    <meta:editing-duration>PT1M28S</meta:editing-duration>
    <meta:editing-cycles>1</meta:editing-cycles>
    <meta:document-statistic meta:table-count="0" meta:image-count="0" meta:object-count="0" meta:page-count="1" meta:paragraph-count="12" meta:word-count="90" meta:character-count="872" meta:non-whitespace-character-count="794"/>
    <meta:generator>LibreOffice/26.2.4.2$Linux_X86_64 LibreOffice_project/620$Build-2</meta:generator>
  </office:meta>
</office:document-meta>
</file>