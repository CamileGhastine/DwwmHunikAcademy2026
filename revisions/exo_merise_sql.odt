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64ea1"/>
    </style:style>
    <style:style style:name="P2" style:family="paragraph" style:parent-style-name="Standard">
      <style:text-properties officeooo:rsid="00164ea1" officeooo:paragraph-rsid="00164ea1"/>
    </style:style>
    <style:style style:name="P3" style:family="paragraph" style:parent-style-name="Standard">
      <style:paragraph-properties style:writing-mode="lr-tb" style:writing-mode-automatic="false"/>
      <style:text-properties officeooo:paragraph-rsid="00164ea1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T1" style:family="text">
      <style:text-properties officeooo:rsid="00164ea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4ea1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e application, publiant des articles, permet à un utilisateur qui s’identifie avec un email et un mot</text:p>
      <text:p text:style-name="Standard">de passe de les commenter. Les articles se composent d’un titre, d’un contenu et d’un auteur.</text:p>
      <text:p text:style-name="Standard"><text:s/></text:p>
      <text:p text:style-name="P1"><text:span text:style-name="T1">1) En utilisant la méthode Merise, construire le MCD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) Construire le MLD textuel.</text:p>
      <text:p text:style-name="P2"/>
      <text:p text:style-name="P3"><text:span text:style-name="Source_20_Text">__________________________________________________________________</text:span></text:p>
      <text:p text:style-name="P3"><text:span text:style-name="Source_20_Text"/></text:p>
      <text:p text:style-name="P3"><text:span text:style-name="Source_20_Text"><text:span text:style-name="T1">__________________________________________________________________</text:span></text:span></text:p>
      <text:p text:style-name="P3"><text:span text:style-name="Source_20_Text"/></text:p>
      <text:p text:style-name="P3"><text:span text:style-name="Source_20_Text"><text:span text:style-name="T1">__________________________________________________________________</text:span></text:span></text:p>
      <text:p text:style-name="P2"/>
      <text:p text:style-name="P2"/>
      <text:p text:style-name="P2">3) Construire le ML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4) Écrire la requête SQL pour récupérer </text:span>le <text:span text:style-name="Strong_20_Emphasis"><text:span text:style-name="T2">titre </text:span></text:span><text:span text:style-name="Strong_20_Emphasis"><text:span text:style-name="T3">et le contenu</text:span></text:span> de tous les articles <text:span text:style-name="T1">publié par par Jean</text:span></text:p>
      <text:p text:style-name="P1"/>
      <text:p text:style-name="P3"><text:span text:style-name="Source_20_Text"><text:span text:style-name="T1">__________________________________________________________________</text:span></text:span></text:p>
      <text:p text:style-name="P3"><text:span text:style-name="Source_20_Text"/></text:p>
      <text:p text:style-name="P3"><text:span text:style-name="T1">5) </text:span><text:s text:c="2"/><text:span text:style-name="T1">Écrire la requête SQL pour </text:span>un nouvel utilisateur avec les informations suivantes :</text:p>
      <text:list text:style-name="L1">
        <text:list-item>
          <text:p text:style-name="P4">Email : <text:span text:style-name="Source_20_Text">paul@mail.com</text:span> </text:p>
        </text:list-item>
        <text:list-item>
          <text:p text:style-name="P5">Mot de passe : <text:span text:style-name="Source_20_Text">azerty123</text:span></text:p>
        </text:list-item>
      </text:list>
      <text:p text:style-name="P3"><text:span text:style-name="Source_20_Text"><text:span text:style-name="T1">__________________________________________________________________</text:span></text:span></text:p>
      <text:p text:style-name="P3"/>
      <text:p text:style-name="P3"><text:span text:style-name="T1">6) </text:span>Modifiez le mot de passe de l'utilisateur dont l'email est « <text:span text:style-name="Source_20_Text">paul@mail.com »</text:span> en « <text:span text:style-name="Source_20_Text">nouveau123 »</text:span></text:p>
      <text:p text:style-name="P3"><text:span text:style-name="Source_20_Text"/></text:p>
      <text:p text:style-name="P3"><text:span text:style-name="Source_20_Text"><text:span text:style-name="T1">__________________________________________________________________</text:span></text:span></text:p>
      <text:p text:style-name="P3"/>
      <text:p text:style-name="P3"><text:span text:style-name="T1">7) </text:span><text:s text:c="2"/><text:span text:style-name="T1">Supprimer le commentaire dont l’identifiant est 5.</text:span></text:p>
      <text:p text:style-name="P3"><text:span text:style-name="Source_20_Text"/></text:p>
      <text:p text:style-name="P3"><text:span text:style-name="Source_20_Text"><text:span text:style-name="T1">__________________________________________________________________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14:29:41.088967758</meta:creation-date>
    <dc:date>2026-06-30T14:38:35.334066710</dc:date>
    <meta:editing-duration>PT8M55S</meta:editing-duration>
    <meta:editing-cycles>1</meta:editing-cycles>
    <meta:document-statistic meta:table-count="0" meta:image-count="0" meta:object-count="0" meta:page-count="1" meta:paragraph-count="19" meta:word-count="128" meta:character-count="1152" meta:non-whitespace-character-count="1038"/>
    <meta:generator>LibreOffice/26.2.4.2$Linux_X86_64 LibreOffice_project/620$Build-2</meta:generator>
  </office:meta>
</office:document-meta>
</file>