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696312" officeooo:paragraph-rsid="0075dc58"/>
    </style:style>
    <style:style style:name="P44" style:family="paragraph" style:parent-style-name="Standard">
      <style:text-properties officeooo:rsid="005ee03a" officeooo:paragraph-rsid="005ee03a"/>
    </style:style>
    <style:style style:name="P45" style:family="paragraph" style:parent-style-name="Standard">
      <style:text-properties officeooo:rsid="005fd246" officeooo:paragraph-rsid="005fd246"/>
    </style:style>
    <style:style style:name="P46" style:family="paragraph" style:parent-style-name="Standard">
      <style:text-properties officeooo:rsid="005df136" officeooo:paragraph-rsid="005df136"/>
    </style:style>
    <style:style style:name="P47" style:family="paragraph" style:parent-style-name="Standard">
      <style:text-properties officeooo:rsid="00696312" officeooo:paragraph-rsid="006c00a7"/>
    </style:style>
    <style:style style:name="P48" style:family="paragraph" style:parent-style-name="Standard">
      <style:text-properties officeooo:paragraph-rsid="006c00a7"/>
    </style:style>
    <style:style style:name="P49" style:family="paragraph" style:parent-style-name="Standard">
      <style:text-properties officeooo:rsid="00696312" officeooo:paragraph-rsid="00696312"/>
    </style:style>
    <style:style style:name="P50" style:family="paragraph" style:parent-style-name="Standard" style:list-style-name="L9">
      <style:text-properties officeooo:rsid="00696312" officeooo:paragraph-rsid="00696312"/>
    </style:style>
    <style:style style:name="P51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3" style:family="paragraph" style:parent-style-name="Standard">
      <style:text-properties officeooo:rsid="00696312" officeooo:paragraph-rsid="006ace54"/>
    </style:style>
    <style:style style:name="P54" style:family="paragraph" style:parent-style-name="Standard">
      <style:text-properties officeooo:rsid="006ace54" officeooo:paragraph-rsid="006ace54"/>
    </style:style>
    <style:style style:name="P55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56" style:family="paragraph" style:parent-style-name="Standard">
      <style:text-properties officeooo:rsid="0059efb1" officeooo:paragraph-rsid="0059efb1"/>
    </style:style>
    <style:style style:name="P57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684b15" style:font-style-asian="normal" style:font-weight-asian="normal" style:font-weight-complex="normal"/>
    </style:style>
    <style:style style:name="T26" style:family="text">
      <style:text-properties fo:font-style="normal" fo:font-weight="bold" style:font-style-asian="normal" style:font-weight-asian="bold" style:font-weight-complex="bold"/>
    </style:style>
    <style:style style:name="T27" style:family="text">
      <style:text-properties fo:font-style="normal" fo:font-weight="normal" officeooo:rsid="005c75b2" style:font-style-asian="normal" style:font-weight-asian="normal"/>
    </style:style>
    <style:style style:name="T28" style:family="text">
      <style:text-properties fo:font-style="normal" fo:font-weight="normal" officeooo:rsid="005b5604" style:font-style-asian="normal" style:font-weight-asian="normal"/>
    </style:style>
    <style:style style:name="T29" style:family="text">
      <style:text-properties officeooo:rsid="0067363a"/>
    </style:style>
    <style:style style:name="T30" style:family="text">
      <style:text-properties officeooo:rsid="00684b15"/>
    </style:style>
    <style:style style:name="T31" style:family="text">
      <style:text-properties fo:font-style="normal" fo:font-weight="normal" officeooo:rsid="0068fca2" style:font-style-asian="normal" style:font-weight-asian="normal"/>
    </style:style>
    <style:style style:name="T32" style:family="text">
      <style:text-properties fo:font-style="normal" fo:font-weight="normal" officeooo:rsid="0068fca2" style:font-style-asian="normal" style:font-weight-asian="normal" style:font-weight-complex="normal"/>
    </style:style>
    <style:style style:name="T33" style:family="text">
      <style:text-properties officeooo:rsid="005c75b2"/>
    </style:style>
    <style:style style:name="T34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none" fo:font-weight="bold" officeooo:rsid="005ee03a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39" style:family="text">
      <style:text-properties officeooo:rsid="00583502"/>
    </style:style>
    <style:style style:name="T40" style:family="text">
      <style:text-properties officeooo:rsid="0055cded"/>
    </style:style>
    <style:style style:name="T41" style:family="text">
      <style:text-properties officeooo:rsid="0069de10"/>
    </style:style>
    <style:style style:name="T42" style:family="text">
      <style:text-properties officeooo:rsid="00658ae6"/>
    </style:style>
    <style:style style:name="T43" style:family="text">
      <style:text-properties officeooo:rsid="006e7f36"/>
    </style:style>
    <style:style style:name="T44" style:family="text">
      <style:text-properties officeooo:rsid="005fd246"/>
    </style:style>
    <style:style style:name="T45" style:family="text">
      <style:text-properties officeooo:rsid="0071bb11"/>
    </style:style>
    <style:style style:name="T46" style:family="text">
      <style:text-properties officeooo:rsid="00696312"/>
    </style:style>
    <style:style style:name="T47" style:family="text">
      <style:text-properties officeooo:rsid="007741c1"/>
    </style:style>
    <style:style style:name="T48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49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50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1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2" style:family="text">
      <style:text-properties officeooo:rsid="0061eade"/>
    </style:style>
    <style:style style:name="T53" style:family="text">
      <style:text-properties officeooo:rsid="0075dc58"/>
    </style:style>
    <style:style style:name="T54" style:family="text">
      <style:text-properties officeooo:rsid="00790c11"/>
    </style:style>
    <style:style style:name="T55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56" style:family="text">
      <style:text-properties officeooo:rsid="006c00a7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weight="bold" officeooo:rsid="006c00a7" style:font-weight-asian="bold" style:font-weight-complex="bold"/>
    </style:style>
    <style:style style:name="T59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3327539986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Status (« </text:span><text:span text:style-name="T25">pending_payment</text:span><text:span text:style-name="T24"> », « </text:span><text:span text:style-name="T25">paid », « shipped », « delivered », « canceled »</text:span><text:span text:style-name="T24">), </text:span><text:span text:style-name="T25">total_amount</text:span></text:p><text:p text:style-name="P7" loext:marker-style-name="T23"><text:span text:style-name="T17">OrderLine :</text:span><text:span text:style-name="T24"> id, Order, Product, Quantity (integer), unitPrice (float) </text:span></text:p><text:p text:style-name="P7" loext:marker-style-name="T14"><text:span text:style-name="T15"/></text:p><text:p text:style-name="P7" loext:marker-style-name="T14"><text:span text:style-name="T26">OrderLine</text:span><text:span text:style-name="T15"> est un élément clé dans la gestion d’un</text:span><text:span text:style-name="T18">e commande</text:span><text:span text:style-name="T15">. Elle permet de stock</text:span><text:span text:style-name="T27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28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28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28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29">la validation de la commande</text:span>.</text:p><text:p text:style-name="P13" loext:marker-style-name="T14"/><text:p text:style-name="P14" loext:marker-style-name="T14">Comprendre <text:span text:style-name="T30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3327539986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1">qui res</text:span><text:span text:style-name="T18">s</text:span><text:span text:style-name="T31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1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Status (« </text:span><text:span text:style-name="T25">open</text:span><text:span text:style-name="T24"> », « </text:span><text:span text:style-name="T32">converted </text:span><text:span text:style-name="T25">»</text:span><text:span text:style-name="T32">)</text:span></text:p><text:p text:style-name="P17" loext:marker-style-name="T23"><text:span text:style-name="T21">Cart</text:span><text:span text:style-name="T17">Line :</text:span><text:span text:style-name="T24"> id, </text:span><text:span text:style-name="T32">Cart</text:span><text:span text:style-name="T24">, Product, Q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3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4">1</text:span><text:span text:style-name="T35">) Constitution du panier</text:span></text:p>
      <text:p text:style-name="P22"/>
      <text:p text:style-name="P23"><text:span text:style-name="T36"><text:tab/></text:span><text:span text:style-name="T37">a</text:span><text:span text:style-name="T38">) </text:span><text:span text:style-name="T37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39">l’</text:span><text:span text:style-name="T40">indicateur du nombre d’articles </text:span><text:span text:style-name="T39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1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2">Modifier le bouton </text:span>« ajouter au panier » <text:span text:style-name="T42">et créer le</text:span> CartController <text:span text:style-name="T42">avec la méthode </text:span>add() <text:span text:style-name="T43">pour</text:span><text:span text:style-name="T44"> enregistrer </text:span><text:span text:style-name="T42">en </text:span><text:span text:style-name="T44">session </text:span><text:span text:style-name="T42">dans « cart » </text:span><text:span text:style-name="T44">un produit </text:span>ajout<text:span text:style-name="T41">é</text:span> au panier.</text:p>
        </text:list-item>
        <text:list-item>
          <text:p text:style-name="P32">« cart » est un tableau qui <text:span text:style-name="T43">représente le panier et</text:span> stocke en clé l’id du produit ajouté et en valeur la quantité de ce produit.</text:p>
          <text:p text:style-name="P33">exemple <text:span text:style-name="T45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6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6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6">=&gt; 4 unité</text:span></text:span></text:p>
      <text:p text:style-name="P37"><text:tab/>]</text:p>
      <text:list xml:id="list212315225717988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3">le panier </text:span>« cart » de<text:span text:style-name="T41">puis </text:span>la session (<text:span text:style-name="T47">renvoye []</text:span> s<text:span text:style-name="T47">i « cart » </text:span>n’existe pas <text:span text:style-name="T47">)</text:span> : </text:p>
          <text:p text:style-name="P32"><text:span text:style-name="T48">$cart</text:span><text:span text:style-name="T49"> = </text:span><text:span text:style-name="T48">$session</text:span><text:span text:style-name="T49">-&gt;</text:span><text:span text:style-name="T50">get</text:span><text:span text:style-name="T49">(</text:span><text:span text:style-name="T51">'cart'</text:span><text:span text:style-name="T49">, []);</text:span></text:p>
        </text:list-item>
      </text:list>
      <text:p text:style-name="P38"><text:span text:style-name="T9"><text:tab/>- Pour modifier « cart » dans la session : </text:span><text:span text:style-name="T48">$session</text:span><text:span text:style-name="T49">-&gt;</text:span><text:span text:style-name="T50">set</text:span><text:span text:style-name="T49">(</text:span><text:span text:style-name="T51">'cart'</text:span><text:span text:style-name="T49">, </text:span><text:span text:style-name="T48">$cart</text:span><text:span text:style-name="T49">);</text:span></text:p>
      <text:list text:style-name="L8">
        <text:list-header>
          <text:p text:style-name="P39"><text:span text:style-name="T43">- Pour suivre l’évolution de votre panier, placer un dump de « cart » dans le contrôleur qui affiche tous les produits  : </text:span><text:span text:style-name="T50">dump</text:span><text:span text:style-name="T49">(</text:span><text:span text:style-name="T48">$session</text:span><text:span text:style-name="T49">-&gt;</text:span><text:span text:style-name="T50">get</text:span><text:span text:style-name="T49">(</text:span><text:span text:style-name="T51">'cart'</text:span><text:span text:style-name="T49">));</text:span></text:p>
          <text:p text:style-name="P40"><text:span text:style-name="T9">- </text:span><text:span text:style-name="T43">Pour vider le panier : <text:s/></text:span><text:span text:style-name="T48">$session</text:span><text:span text:style-name="T49">-&gt;</text:span><text:span text:style-name="T50">remove</text:span><text:span text:style-name="T49">(</text:span><text:span text:style-name="T51">'cart'</text:span><text:span text:style-name="T49">);</text:span></text:p>
        </text:list-header>
      </text:list>
      <text:list text:continue-list="list212315225717988" text:style-name="L7">
        <text:list-item>
          <text:p text:style-name="P41">Créer <text:span text:style-name="T42">la vue offcanva</text:span><text:span text:style-name="T41">s</text:span><text:span text:style-name="T42"> et</text:span> modifier l<text:span text:style-name="T42">a</text:span> vue barre de navigation</text:p>
        </text:list-item>
        <text:list-item>
          <text:p text:style-name="P41">Afficher le produit <text:span text:style-name="T52">dans le panier</text:span></text:p>
          <text:p text:style-name="P42">Pour cela on va créer une méthode getCart() dans un CartHandler qu’on pourra directement appeler dans notre offcanvas avec Twig <text:span text:style-name="T46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43"/>
      <text:p text:style-name="P43">⚠️ On<text:span text:style-name="T53"> ne créé pas d’entité Cart ici. </text:span><text:span text:style-name="T54">On le fera </text:span><text:span text:style-name="T53">dans le 1)c lorsqu’on aura besoin d’enregistrer en BDD.</text:span></text:p>
      <text:p text:style-name="P43"/>
      <text:p text:style-name="P43"/>
      <text:p text:style-name="P44"><text:tab/><text:span text:style-name="T35">b) Gestion du panier</text:span></text:p>
      <text:p text:style-name="P45"><text:soft-page-break/></text:p>
      <text:p text:style-name="P45">Dans le offcanvas, activer les bouton -, +, 🗑️ et vider le panier.</text:p>
      <text:p text:style-name="P45">Ces boutons appellent <text:span text:style-name="T41">via </text:span>AJAX les méthodes de CartController (add, decrease, remove et clear)</text:p>
      <text:p text:style-name="P46"/>
      <text:p text:style-name="P46"/>
      <text:p text:style-name="P46"/>
      <text:p text:style-name="P46"><text:tab/><text:span text:style-name="T55">c) 💪 Enregistrement en BDD du panier pour un utilisateur connecté</text:span></text:p>
      <text:p text:style-name="P46"/>
      <text:p text:style-name="P45">Afin que le panier de l’utilisateur soit conservé même après une déconnexion, on souhaite que le panier soit enregistré en BDD.</text:p>
      <text:p text:style-name="P45"/>
      <text:p text:style-name="P47">En pratique, <text:span text:style-name="T56">s</text:span>i l’<text:span text:style-name="T56">utilisateur</text:span> n’est pas connecté, <text:span text:style-name="T56">le panier</text:span> est <text:span text:style-name="T56">stocké</text:span> <text:span text:style-name="T57">uniquement</text:span> en session.</text:p>
      <text:p text:style-name="P48"><text:span text:style-name="T56">Alors que s’il </text:span><text:span text:style-name="T46">est connecté </text:span>le panier <text:span text:style-name="T56">n’</text:span>est <text:span text:style-name="T56">pas</text:span> stocké en session<text:span text:style-name="T46">, mais directement </text:span><text:span text:style-name="T56">et </text:span><text:span text:style-name="T58">uniquement</text:span><text:span text:style-name="T46"> </text:span><text:span text:style-name="T59">en BDD</text:span><text:span text:style-name="T46">.</text:span></text:p>
      <text:p text:style-name="P49"/>
      <text:p text:style-name="P49">⚠️ Attention, on a qu’une seule source de vérité.</text:p>
      <text:list text:style-name="L9">
        <text:list-item>
          <text:p text:style-name="P50">la session, si l’utilisateur n’est pas connecté</text:p>
        </text:list-item>
        <text:list-item>
          <text:p text:style-name="P50">la bdd, si l’utilisateur est connecté</text:p>
        </text:list-item>
      </text:list>
      <text:p text:style-name="P51">C’est l’un ou l’autre, mais <text:span text:style-name="T41">jamais</text:span> les deux en même temps.</text:p>
      <text:p text:style-name="P46"/>
      <text:p text:style-name="P52">Aide à la réalisation :</text:p>
      <text:p text:style-name="P53"/>
      <text:p text:style-name="P54">Dans les méthodes du CartController, il faut vérifier si l’utilisateur est connecté pour enregistrer en session ou en bdd.</text:p>
      <text:p text:style-name="P54"/>
      <text:p text:style-name="P47"><text:span text:style-name="T59">Dans le cas où l’utilisateur se connecte après avoir commencé </text:span><text:span text:style-name="T56">à</text:span><text:span text:style-name="T59"> constituer un panier, c</text:span>’est au moment de la connexion que le panier en session sera enregistré en BD<text:span text:style-name="T56">D.</text:span></text:p>
      <text:p text:style-name="P47"><text:span text:style-name="T59">Pour faire cela, on va utiliser un Event</text:span><text:span text:style-name="T56">Subscriber</text:span><text:span text:style-name="T59"> qui va écouter la connexion. </text:span><text:span text:style-name="T56">En cas de connexion, il va enregistrer en BDD un panier (s’il existe déjà en session) et le supprimer de la session.</text:span></text:p>
      <text:p text:style-name="P47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6"/>
      <text:p text:style-name="P46"><text:span text:style-name="T35">2) Tunnel de vente</text:span> </text:p>
      <text:p text:style-name="P46"/>
      <text:p text:style-name="P28"/>
      <text:p text:style-name="P28"/>
      <text:p text:style-name="P28"/>
      <text:p text:style-name="P28"/>
      <text:p text:style-name="P28"/>
      <text:p text:style-name="P2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6"/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7T21:23:14.748134232</dc:date>
    <meta:editing-duration>P1DT1H39M45S</meta:editing-duration>
    <meta:editing-cycles>44</meta:editing-cycles>
    <meta:generator>LibreOffice/26.2.2.2$Linux_X86_64 LibreOffice_project/620$Build-2</meta:generator>
    <meta:document-statistic meta:table-count="0" meta:image-count="2" meta:object-count="0" meta:page-count="4" meta:paragraph-count="83" meta:word-count="1023" meta:character-count="5924" meta:non-whitespace-character-count="4966"/>
  </office:meta>
</office:document-meta>
</file>