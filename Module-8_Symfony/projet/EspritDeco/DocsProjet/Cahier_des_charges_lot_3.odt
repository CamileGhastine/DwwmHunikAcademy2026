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1000001F50E34398A.png" manifest:media-type="image/png"/>
  <manifest:file-entry manifest:full-path="Pictures/10000001000001EB000000453AA73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officeooo:paragraph-rsid="0053e4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53e4e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53e4e0" officeooo:paragraph-rsid="00544d8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b56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style="normal" fo:font-weight="normal" officeooo:paragraph-rsid="005b5604" style:font-size-asian="10pt" style:font-style-asian="normal" style:font-weight-asian="normal" style:font-size-complex="10pt"/>
    </style:style>
    <style:style style:name="P7" style:family="paragraph" style:parent-style-name="Standard">
      <style:text-properties style:font-name="Liberation Serif" fo:font-size="10pt" officeooo:paragraph-rsid="005b5604" style:font-size-asian="10pt" style:font-size-complex="10pt"/>
    </style:style>
    <style:style style:name="P8" style:family="paragraph" style:parent-style-name="Standard" style:list-style-name="L2">
      <style:text-properties style:font-name="Liberation Serif" fo:font-size="10pt" officeooo:paragraph-rsid="005b5604" style:font-size-asian="10pt" style:font-size-complex="10pt"/>
    </style:style>
    <style:style style:name="P9" style:family="paragraph" style:parent-style-name="Standard" style:list-style-name="L3">
      <style:text-properties style:font-name="Liberation Serif" fo:font-size="10pt" officeooo:paragraph-rsid="005b5604" style:font-size-asian="10pt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Liberation Serif" fo:font-size="10pt" officeooo:paragraph-rsid="005b5604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officeooo:paragraph-rsid="005b5604" style:font-size-asian="10pt" style:font-size-complex="10pt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5b5604" officeooo:paragraph-rsid="005b5604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0pt" fo:font-style="normal" style:text-underline-style="solid" style:text-underline-width="auto" style:text-underline-color="font-color" fo:font-weight="bold" officeooo:rsid="0067363a" officeooo:paragraph-rsid="0067363a" style:font-size-asian="10pt" style:font-style-asian="normal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style="normal" fo:font-weight="normal" officeooo:rsid="00684b15" officeooo:paragraph-rsid="00684b15" style:font-size-asian="10pt" style:font-style-asian="normal" style:font-weight-asian="normal" style:font-size-complex="10pt"/>
    </style:style>
    <style:style style:name="P16" style:family="paragraph" style:parent-style-name="Standard">
      <style:text-properties style:font-name="Liberation Serif" fo:font-size="10pt" fo:font-style="normal" fo:font-weight="normal" officeooo:paragraph-rsid="00684b15" style:font-size-asian="10pt" style:font-style-asian="normal" style:font-weight-asian="normal" style:font-size-complex="10pt"/>
    </style:style>
    <style:style style:name="P17" style:family="paragraph" style:parent-style-name="Standard">
      <style:text-properties style:font-name="Liberation Serif" fo:font-size="10pt" officeooo:paragraph-rsid="00684b15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paragraph-rsid="00684b15" style:font-size-asian="10pt" style:font-size-complex="10pt"/>
    </style:style>
    <style:style style:name="P19" style:family="paragraph" style:parent-style-name="Standard">
      <style:text-properties style:font-name="Liberation Serif" fo:font-size="10pt" officeooo:paragraph-rsid="0067363a" style:font-size-asian="10pt" style:font-size-complex="10pt"/>
    </style:style>
    <style:style style:name="P20" style:family="paragraph" style:parent-style-name="Standard" style:list-style-name="L4">
      <style:text-properties style:font-name="Liberation Serif" fo:font-size="10pt" officeooo:paragraph-rsid="0067363a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ee03a" officeooo:paragraph-rsid="0055cded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3e2" officeooo:paragraph-rsid="0055cded" style:font-weight-asian="bold" style:font-weight-complex="bold"/>
    </style:style>
    <style:style style:name="P23" style:family="paragraph" style:parent-style-name="Standard">
      <style:text-properties officeooo:paragraph-rsid="0055cded"/>
    </style:style>
    <style:style style:name="P24" style:family="paragraph" style:parent-style-name="Standard">
      <style:text-properties officeooo:rsid="0055cded" officeooo:paragraph-rsid="0055cded"/>
    </style:style>
    <style:style style:name="P25" style:family="paragraph" style:parent-style-name="Standard">
      <style:text-properties officeooo:rsid="00583502" officeooo:paragraph-rsid="005d95f3"/>
    </style:style>
    <style:style style:name="P26" style:family="paragraph" style:parent-style-name="Standard" style:list-style-name="L5">
      <style:text-properties officeooo:paragraph-rsid="005d95f3"/>
    </style:style>
    <style:style style:name="P27" style:family="paragraph" style:parent-style-name="Standard" style:list-style-name="L6">
      <style:text-properties officeooo:rsid="00583502" officeooo:paragraph-rsid="00583502"/>
    </style:style>
    <style:style style:name="P28" style:family="paragraph" style:parent-style-name="Standard">
      <style:text-properties officeooo:rsid="0059efb1" officeooo:paragraph-rsid="0055cded"/>
    </style:style>
    <style:style style:name="P29" style:family="paragraph" style:parent-style-name="Standard">
      <style:text-properties officeooo:rsid="005d95f3" officeooo:paragraph-rsid="005d95f3"/>
    </style:style>
    <style:style style:name="P30" style:family="paragraph" style:parent-style-name="Standard">
      <style:text-properties style:text-underline-style="solid" style:text-underline-width="auto" style:text-underline-color="font-color" officeooo:rsid="005ee03a" officeooo:paragraph-rsid="005ee03a"/>
    </style:style>
    <style:style style:name="P31" style:family="paragraph" style:parent-style-name="Standard" style:list-style-name="L7">
      <style:paragraph-properties fo:text-align="left" style:justify-single-word="false"/>
      <style:text-properties officeooo:rsid="005ee03a" officeooo:paragraph-rsid="00658ae6"/>
    </style:style>
    <style:style style:name="P32" style:family="paragraph" style:parent-style-name="Standard" style:list-style-name="L7">
      <style:paragraph-properties fo:text-align="left" style:justify-single-word="false"/>
      <style:text-properties officeooo:rsid="0068fca2" officeooo:paragraph-rsid="0068fca2"/>
    </style:style>
    <style:style style:name="P33" style:family="paragraph" style:parent-style-name="Standard" style:list-style-name="L7">
      <style:paragraph-properties fo:text-align="left" style:justify-single-word="false"/>
      <style:text-properties officeooo:rsid="00658ae6" officeooo:paragraph-rsid="00658ae6"/>
    </style:style>
    <style:style style:name="P34" style:family="paragraph" style:parent-style-name="Preformatted_20_Text" style:list-style-name="L7">
      <style:paragraph-properties fo:text-align="left" style:justify-single-word="false"/>
      <style:text-properties officeooo:rsid="00658ae6" officeooo:paragraph-rsid="006e7f36"/>
    </style:style>
    <style:style style:name="P35" style:family="paragraph" style:parent-style-name="Preformatted_20_Text">
      <style:paragraph-properties fo:text-align="left" style:justify-single-word="false"/>
      <style:text-properties officeooo:rsid="00658ae6" officeooo:paragraph-rsid="006e7f36"/>
    </style:style>
    <style:style style:name="P36" style:family="paragraph" style:parent-style-name="Preformatted_20_Text">
      <style:text-properties officeooo:rsid="00658ae6"/>
    </style:style>
    <style:style style:name="P37" style:family="paragraph" style:parent-style-name="Preformatted_20_Text">
      <style:paragraph-properties fo:margin-top="0cm" fo:margin-bottom="0cm" style:contextual-spacing="false"/>
      <style:text-properties officeooo:rsid="00658ae6" officeooo:paragraph-rsid="00658ae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8">
      <style:paragraph-properties fo:text-align="left" style:justify-single-word="false"/>
      <style:text-properties officeooo:paragraph-rsid="006e7f36"/>
    </style:style>
    <style:style style:name="P40" style:family="paragraph" style:parent-style-name="Standard" style:list-style-name="L8">
      <style:paragraph-properties fo:text-align="left" style:justify-single-word="false"/>
      <style:text-properties officeooo:paragraph-rsid="0068fca2"/>
    </style:style>
    <style:style style:name="P41" style:family="paragraph" style:parent-style-name="Standard" style:list-style-name="L7">
      <style:text-properties officeooo:rsid="005ee03a" officeooo:paragraph-rsid="006e7f36"/>
    </style:style>
    <style:style style:name="P42" style:family="paragraph" style:parent-style-name="Standard" style:list-style-name="L7">
      <style:text-properties officeooo:rsid="00658ae6" officeooo:paragraph-rsid="00658ae6"/>
    </style:style>
    <style:style style:name="P43" style:family="paragraph" style:parent-style-name="Standard">
      <style:text-properties officeooo:rsid="005ee03a" officeooo:paragraph-rsid="005ee03a"/>
    </style:style>
    <style:style style:name="P44" style:family="paragraph" style:parent-style-name="Standard">
      <style:text-properties officeooo:rsid="005fd246" officeooo:paragraph-rsid="005fd246"/>
    </style:style>
    <style:style style:name="P45" style:family="paragraph" style:parent-style-name="Standard">
      <style:text-properties officeooo:rsid="005df136" officeooo:paragraph-rsid="005df136"/>
    </style:style>
    <style:style style:name="P46" style:family="paragraph" style:parent-style-name="Standard">
      <style:text-properties officeooo:rsid="00696312" officeooo:paragraph-rsid="006c00a7"/>
    </style:style>
    <style:style style:name="P47" style:family="paragraph" style:parent-style-name="Standard">
      <style:text-properties officeooo:paragraph-rsid="006c00a7"/>
    </style:style>
    <style:style style:name="P48" style:family="paragraph" style:parent-style-name="Standard">
      <style:text-properties officeooo:rsid="00696312" officeooo:paragraph-rsid="00696312"/>
    </style:style>
    <style:style style:name="P49" style:family="paragraph" style:parent-style-name="Standard" style:list-style-name="L9">
      <style:text-properties officeooo:rsid="00696312" officeooo:paragraph-rsid="00696312"/>
    </style:style>
    <style:style style:name="P50" style:family="paragraph" style:parent-style-name="Standard">
      <style:text-properties fo:font-weight="bold" officeooo:rsid="00696312" officeooo:paragraph-rsid="00696312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officeooo:rsid="005ee03a" officeooo:paragraph-rsid="006ace54"/>
    </style:style>
    <style:style style:name="P52" style:family="paragraph" style:parent-style-name="Standard">
      <style:text-properties officeooo:rsid="00696312" officeooo:paragraph-rsid="006ace54"/>
    </style:style>
    <style:style style:name="P53" style:family="paragraph" style:parent-style-name="Standard">
      <style:text-properties officeooo:rsid="006ace54" officeooo:paragraph-rsid="006ace54"/>
    </style:style>
    <style:style style:name="P54" style:family="paragraph" style:parent-style-name="Standard">
      <style:paragraph-properties fo:text-align="center" style:justify-single-word="false"/>
      <style:text-properties officeooo:rsid="0059efb1" officeooo:paragraph-rsid="00583502"/>
    </style:style>
    <style:style style:name="P55" style:family="paragraph" style:parent-style-name="Standard">
      <style:text-properties officeooo:rsid="0059efb1" officeooo:paragraph-rsid="0059efb1"/>
    </style:style>
    <style:style style:name="P56" style:family="paragraph" style:parent-style-name="Standard">
      <style:text-properties officeooo:rsid="005a4b10" officeooo:paragraph-rsid="005a4b10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b7f8" style:font-size-asian="12pt" style:font-size-complex="12pt"/>
    </style:style>
    <style:style style:name="T5" style:family="text">
      <style:text-properties fo:font-size="12pt" officeooo:rsid="0053e4e0" style:font-size-asian="12pt" style:font-size-complex="12pt"/>
    </style:style>
    <style:style style:name="T6" style:family="text">
      <style:text-properties fo:font-size="12pt" officeooo:rsid="001b8739" style:font-size-asian="12pt" style:font-size-complex="12pt"/>
    </style:style>
    <style:style style:name="T7" style:family="text">
      <style:text-properties officeooo:rsid="001bd7e4"/>
    </style:style>
    <style:style style:name="T8" style:family="text">
      <style:text-properties officeooo:rsid="005df136"/>
    </style:style>
    <style:style style:name="T9" style:family="text">
      <style:text-properties officeooo:rsid="0068fca2"/>
    </style:style>
    <style:style style:name="T10" style:family="text">
      <style:text-properties officeooo:rsid="0053e4e0"/>
    </style:style>
    <style:style style:name="T11" style:family="text">
      <style:text-properties fo:font-family="0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fo:font-style="normal" style:text-underline-style="solid" style:text-underline-width="auto" style:text-underline-color="font-color" style:font-style-asian="normal"/>
    </style:style>
    <style:style style:name="T13" style:family="text">
      <style:text-properties fo:font-style="normal" style:text-underline-style="solid" style:text-underline-width="auto" style:text-underline-color="font-color" officeooo:rsid="0067363a" style:font-style-asian="normal"/>
    </style:style>
    <style:style style:name="T14" style:family="text">
      <style:text-properties fo:font-family="0" style:font-family-generic="roman" style:font-pitch="variable" fo:font-size="12pt" fo:font-style="normal" fo:font-weight="normal" style:font-size-asian="12pt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67363a" style:font-style-asian="normal" style:font-weight-asian="normal"/>
    </style:style>
    <style:style style:name="T17" style:family="text">
      <style:text-properties fo:font-style="normal" fo:font-weight="bold" style:font-style-asian="normal" style:font-weight-asian="bold"/>
    </style:style>
    <style:style style:name="T18" style:family="text">
      <style:text-properties fo:font-style="normal" fo:font-weight="normal" officeooo:rsid="00684b15" style:font-style-asian="normal" style:font-weight-asian="normal"/>
    </style:style>
    <style:style style:name="T19" style:family="text">
      <style:text-properties fo:font-style="normal" fo:font-weight="normal" officeooo:rsid="005d95f3" style:font-style-asian="normal" style:font-weight-asian="normal"/>
    </style:style>
    <style:style style:name="T20" style:family="text">
      <style:text-properties fo:font-style="normal" fo:font-weight="bold" officeooo:rsid="00684b15" style:font-style-asian="normal" style:font-weight-asian="bold"/>
    </style:style>
    <style:style style:name="T21" style:family="text">
      <style:text-properties fo:font-family="0" style:font-family-generic="roman" style:font-pitch="variable" fo:font-size="12pt" fo:font-style="normal" fo:font-weight="bold" style:font-size-asian="12pt" style:font-style-asian="normal" style:font-weight-asian="bold"/>
    </style:style>
    <style:style style:name="T22" style:family="text">
      <style:text-properties fo:font-style="normal" fo:font-weight="normal" style:font-style-asian="normal" style:font-weight-asian="normal" style:font-weight-complex="normal"/>
    </style:style>
    <style:style style:name="T23" style:family="text">
      <style:text-properties fo:font-style="normal" fo:font-weight="normal" officeooo:rsid="00684b15" style:font-style-asian="normal" style:font-weight-asian="normal" style:font-weight-complex="normal"/>
    </style:style>
    <style:style style:name="T24" style:family="text">
      <style:text-properties fo:font-style="normal" fo:font-weight="bold" style:font-style-asian="normal" style:font-weight-asian="bold" style:font-weight-complex="bold"/>
    </style:style>
    <style:style style:name="T25" style:family="text">
      <style:text-properties fo:font-style="normal" fo:font-weight="normal" officeooo:rsid="005c75b2" style:font-style-asian="normal" style:font-weight-asian="normal"/>
    </style:style>
    <style:style style:name="T26" style:family="text">
      <style:text-properties fo:font-style="normal" fo:font-weight="normal" officeooo:rsid="005b5604" style:font-style-asian="normal" style:font-weight-asian="normal"/>
    </style:style>
    <style:style style:name="T27" style:family="text">
      <style:text-properties officeooo:rsid="0067363a"/>
    </style:style>
    <style:style style:name="T28" style:family="text">
      <style:text-properties officeooo:rsid="00684b15"/>
    </style:style>
    <style:style style:name="T29" style:family="text">
      <style:text-properties fo:font-style="normal" fo:font-weight="normal" officeooo:rsid="0068fca2" style:font-style-asian="normal" style:font-weight-asian="normal"/>
    </style:style>
    <style:style style:name="T30" style:family="text">
      <style:text-properties fo:font-style="normal" fo:font-weight="normal" officeooo:rsid="0068fca2" style:font-style-asian="normal" style:font-weight-asian="normal" style:font-weight-complex="normal"/>
    </style:style>
    <style:style style:name="T31" style:family="text">
      <style:text-properties officeooo:rsid="005c75b2"/>
    </style:style>
    <style:style style:name="T32" style:family="text">
      <style:text-properties style:text-underline-style="solid" style:text-underline-width="auto" style:text-underline-color="font-color" fo:font-weight="bold" officeooo:rsid="0068fca2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none" fo:font-weight="bold" officeooo:rsid="005ee03a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5ee03a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1ad34c" style:font-weight-asian="bold" style:font-weight-complex="bold"/>
    </style:style>
    <style:style style:name="T37" style:family="text">
      <style:text-properties officeooo:rsid="00583502"/>
    </style:style>
    <style:style style:name="T38" style:family="text">
      <style:text-properties officeooo:rsid="0055cded"/>
    </style:style>
    <style:style style:name="T39" style:family="text">
      <style:text-properties officeooo:rsid="0069de10"/>
    </style:style>
    <style:style style:name="T40" style:family="text">
      <style:text-properties officeooo:rsid="00658ae6"/>
    </style:style>
    <style:style style:name="T41" style:family="text">
      <style:text-properties officeooo:rsid="006e7f36"/>
    </style:style>
    <style:style style:name="T42" style:family="text">
      <style:text-properties officeooo:rsid="005fd246"/>
    </style:style>
    <style:style style:name="T43" style:family="text">
      <style:text-properties officeooo:rsid="00696312"/>
    </style:style>
    <style:style style:name="T44" style:family="text">
      <style:text-properties fo:color="#9cdcfe" loext:opacity="100%" fo:font-family="'Droid Sans Mono', monospace" fo:font-size="10.5pt" fo:font-weight="normal" fo:background-color="#1f1f1f" loext:char-shading-value="0"/>
    </style:style>
    <style:style style:name="T45" style:family="text">
      <style:text-properties fo:color="#d4d4d4" loext:opacity="100%" fo:font-family="'Droid Sans Mono', monospace" fo:font-size="10.5pt" fo:font-weight="normal" fo:background-color="#1f1f1f" loext:char-shading-value="0"/>
    </style:style>
    <style:style style:name="T46" style:family="text">
      <style:text-properties fo:color="#dcdcaa" loext:opacity="100%" fo:font-family="'Droid Sans Mono', monospace" fo:font-size="10.5pt" fo:font-weight="normal" fo:background-color="#1f1f1f" loext:char-shading-value="0"/>
    </style:style>
    <style:style style:name="T47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48" style:family="text">
      <style:text-properties officeooo:rsid="0061eade"/>
    </style:style>
    <style:style style:name="T49" style:family="text">
      <style:text-properties style:text-underline-style="solid" style:text-underline-width="auto" style:text-underline-color="font-color" fo:font-weight="bold" officeooo:rsid="005fd246" style:font-weight-asian="bold" style:font-weight-complex="bold"/>
    </style:style>
    <style:style style:name="T50" style:family="text">
      <style:text-properties officeooo:rsid="006c00a7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weight="bold" officeooo:rsid="006c00a7" style:font-weight-asian="bold" style:font-weight-complex="bold"/>
    </style:style>
    <style:style style:name="T53" style:family="text">
      <style:text-properties officeooo:rsid="006ace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dddddd" draw:fill="solid" draw:fill-color="#dddddd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h text:style-name="P2" text:outline-level="3"><text:span text:style-name="T3">🟢 <text:s/></text:span><text:span text:style-name="T4">Lot </text:span><text:span text:style-name="T5">3</text:span><text:span text:style-name="T4"> : </text:span><text:span text:style-name="T5">Front</text:span><text:span text:style-name="T6"> Office</text:span><text:span text:style-name="T4"> – </text:span><text:span text:style-name="T5">Passer une commande</text:span></text:h>
      <text:list text:style-name="L1">
        <text:list-item>
          <text:p text:style-name="P3"><text:span text:style-name="T7">Constitution </text:span><text:span text:style-name="T8">et gestion d</text:span><text:span text:style-name="T7">’un </text:span><text:span text:style-name="T9">p</text:span>anier<text:span text:style-name="T10"> (affichage, </text:span><text:span text:style-name="T8">ajout, </text:span><text:span text:style-name="T10">suppression, modification des quantités)</text:span></text:p>
        </text:list-item>
        <text:list-item>
          <text:p text:style-name="P4">Tunnel de vente pour passer commande</text:p>
        </text:list-item>
        <text:list-item>
          <text:p text:style-name="P4"><draw:frame draw:style-name="fr1" draw:name="Cadre1" text:anchor-type="char" svg:x="0.168cm" svg:y="0.935cm" svg:width="17.979cm" draw:z-index="1"><draw:text-box fo:min-height="22.477cm"><text:p text:style-name="P5" loext:marker-style-name="T11"><text:span text:style-name="T12">Comprendre la gestion d’un</text:span><text:span text:style-name="T13">e commande</text:span></text:p><text:p text:style-name="P6" loext:marker-style-name="T14"/><text:p text:style-name="P7" loext:marker-style-name="T14"><text:span text:style-name="T15">Pour gérer un</text:span><text:span text:style-name="T16">e commande</text:span><text:span text:style-name="T15"> sur un site e-commerce, on a besoin des entités User, Product et de deux nouvelles entités :</text:span></text:p><text:list xml:id="list2062677370" text:style-name="L2"><text:list-item><text:p text:style-name="P8" loext:marker-style-name="T14"><text:span text:style-name="T16">Order</text:span><text:span text:style-name="T15"> (qui représente l</text:span><text:span text:style-name="T16">a commande</text:span><text:span text:style-name="T15">)</text:span></text:p></text:list-item><text:list-item><text:p text:style-name="P8" loext:marker-style-name="T14"><text:span text:style-name="T15">OrderLine (qui représente les lignes d</text:span><text:span text:style-name="T16">e la commande</text:span><text:span text:style-name="T15">)</text:span></text:p></text:list-item></text:list><text:p text:style-name="P6" loext:marker-style-name="T14"/><text:p text:style-name="P7" loext:marker-style-name="T14"><text:span text:style-name="T15">Un utilisateur (</text:span><text:span text:style-name="T17">User</text:span><text:span text:style-name="T15">) peut constituer 0 ou </text:span><text:span text:style-name="T18">plusieurs</text:span><text:span text:style-name="T16"> commande</text:span><text:span text:style-name="T15"> (</text:span><text:span text:style-name="T17">Order</text:span><text:span text:style-name="T15">) </text:span><text:span text:style-name="T19">et 1 </text:span><text:span text:style-name="T16">commande</text:span><text:span text:style-name="T19"> appartient à 1 et 1 seul utilisateur :</text:span><text:span text:style-name="T15"> </text:span><text:span text:style-name="T17">User (0,</text:span><text:span text:style-name="T20">N</text:span><text:span text:style-name="T17">)-- constitue –(1,1) Order</text:span></text:p><text:p text:style-name="P7" loext:marker-style-name="T14"><text:span text:style-name="T15">Un</text:span><text:span text:style-name="T16">e commande</text:span><text:span text:style-name="T15"> (</text:span><text:span text:style-name="T17">Order</text:span><text:span text:style-name="T15">) peut contenir 1 ou plusieurs lignes (</text:span><text:span text:style-name="T17">OrderLine</text:span><text:span text:style-name="T15">) e</text:span><text:span text:style-name="T19">t une ligne appartient à 1 et 1 seul</text:span><text:span text:style-name="T16">e commande</text:span><text:span text:style-name="T19"> </text:span><text:span text:style-name="T15">: </text:span><text:span text:style-name="T17">Order (1,N)--contient--(1,1) OrderLine</text:span></text:p><text:p text:style-name="P7" loext:marker-style-name="T14"><text:span text:style-name="T15">Une ligne (</text:span><text:span text:style-name="T17">OrderLine</text:span><text:span text:style-name="T15">) concerne 1 et 1 seul produit (</text:span><text:span text:style-name="T17">Product</text:span><text:span text:style-name="T15">) </text:span><text:span text:style-name="T19">et 1 produit <text:s/>appartient à 0 ou plusieurs lignes </text:span><text:span text:style-name="T15">: </text:span><text:span text:style-name="T17">OrderLine (1,1) –concerne--(0,N) Product</text:span></text:p><text:p text:style-name="P6" loext:marker-style-name="T14"/><text:p text:style-name="P7" loext:marker-style-name="T21"><text:span text:style-name="T17">Order : </text:span><text:span text:style-name="T22">id , user, createdAt (DateTimeImmutable), Status (« </text:span><text:span text:style-name="T23">pending_payment</text:span><text:span text:style-name="T22"> », « </text:span><text:span text:style-name="T23">paid », « shipped », « delivered », « canceled »</text:span><text:span text:style-name="T22">), </text:span><text:span text:style-name="T23">total_amount</text:span></text:p><text:p text:style-name="P7" loext:marker-style-name="T21"><text:span text:style-name="T17">OrderLine :</text:span><text:span text:style-name="T22"> id, Order, Product, Quantity (integer), unitPrice (float) </text:span></text:p><text:p text:style-name="P7" loext:marker-style-name="T14"><text:span text:style-name="T15"/></text:p><text:p text:style-name="P7" loext:marker-style-name="T14"><text:span text:style-name="T24">OrderLine</text:span><text:span text:style-name="T15"> est un élément clé dans la gestion d’un panier. Elle permet de stock</text:span><text:span text:style-name="T25">er</text:span><text:span text:style-name="T15"> le produit ajouté au panier et sa quantité.</text:span></text:p><text:p text:style-name="P6" loext:marker-style-name="T14"/><text:p text:style-name="P7" loext:marker-style-name="T14"><text:span text:style-name="T15">Exemple de panier :</text:span></text:p><text:list text:style-name="L3"><text:list-item><text:p text:style-name="P9" loext:marker-style-name="T14"><text:span text:style-name="T15">3 tomates</text:span></text:p></text:list-item><text:list-item><text:p text:style-name="P9" loext:marker-style-name="T14"><text:span text:style-name="T15">4 carottes</text:span></text:p></text:list-item><text:list-item><text:p text:style-name="P9" loext:marker-style-name="T14"><text:span text:style-name="T15">1 chou</text:span></text:p></text:list-item></text:list><text:p text:style-name="P6" loext:marker-style-name="T14"/><text:p text:style-name="P6" loext:marker-style-name="T14">Dans la BDD, 3 lignes seront enregistrées dans la table Order_line :</text:p><text:p text:style-name="P10" loext:marker-style-name="T14"><text:span text:style-name="T15">id<text:tab/>Order_id<text:tab/><text:tab/>product_id<text:tab/><text:tab/>quantity<text:tab/></text:span><text:span text:style-name="T18">unit_</text:span><text:span text:style-name="T15">price</text:span></text:p><text:p text:style-name="P11" loext:marker-style-name="T14"><text:span text:style-name="T15"><text:tab/></text:span><text:span text:style-name="T26">1<text:tab/></text:span><text:span text:style-name="T15">13 <text:s/><text:tab/><text:tab/><text:tab/>7 (id de la tomate)<text:tab/>3<text:tab/><text:tab/>3</text:span></text:p><text:p text:style-name="P11" loext:marker-style-name="T14"><text:span text:style-name="T15"><text:tab/></text:span><text:span text:style-name="T26">2<text:tab/></text:span><text:span text:style-name="T15">13<text:tab/><text:tab/><text:tab/>4 (id de la carotte)<text:tab/>4<text:tab/><text:tab/>2</text:span></text:p><text:p text:style-name="P11" loext:marker-style-name="T14"><text:span text:style-name="T15"><text:tab/></text:span><text:span text:style-name="T26">3<text:tab/></text:span><text:span text:style-name="T15">13<text:tab/><text:tab/><text:tab/></text:span><text:span text:style-name="T18">5</text:span><text:span text:style-name="T15"> (id du chou)<text:tab/><text:tab/>1<text:tab/><text:tab/>4,5 </text:span></text:p><text:p text:style-name="P12" loext:marker-style-name="T14"/><text:p text:style-name="P13" loext:marker-style-name="T14">« Price » représente le prix unitaire du produit au moment de <text:span text:style-name="T27">la validation de la commande</text:span>.</text:p><text:p text:style-name="P13" loext:marker-style-name="T14"/><text:p text:style-name="P14" loext:marker-style-name="T14">Comprendre <text:span text:style-name="T28">la gestion du panier</text:span></text:p><text:p text:style-name="P15" loext:marker-style-name="T14"/><text:p text:style-name="P15" loext:marker-style-name="T14">Avant de passer une commande, l’utilisateur constitue son panier. Ce n’est qu’au moment de la validation de son panier que la commande sera créée.</text:p><text:p text:style-name="P16" loext:marker-style-name="T14"/><text:p text:style-name="P17" loext:marker-style-name="T14"><text:span text:style-name="T15">Pour gérer </text:span><text:span text:style-name="T18">ce panier, on</text:span><text:span text:style-name="T15"> a besoin des entités User, Product et de deux nouvelles entités :</text:span></text:p><text:list text:continue-list="list2062677370" text:style-name="L2"><text:list-item><text:p text:style-name="P18" loext:marker-style-name="T14"><text:span text:style-name="T18">Cart</text:span><text:span text:style-name="T15"> (qui représente l</text:span><text:span text:style-name="T16">a commande</text:span><text:span text:style-name="T15">) </text:span><text:span text:style-name="T29">qui resemble beaucoup à</text:span><text:span text:style-name="T18"> Order</text:span></text:p></text:list-item><text:list-item><text:p text:style-name="P18" loext:marker-style-name="T14"><text:span text:style-name="T18">Cart</text:span><text:span text:style-name="T15">Line (qui représente les lignes d</text:span><text:span text:style-name="T18">u panier</text:span><text:span text:style-name="T15">) </text:span><text:span text:style-name="T29">qui ressemble beaucoup à</text:span><text:span text:style-name="T18"> OrderLine</text:span></text:p></text:list-item></text:list><text:p text:style-name="P16" loext:marker-style-name="T14"/><text:p text:style-name="P17" loext:marker-style-name="T14"><text:span text:style-name="T15">Un utilisateur (</text:span><text:span text:style-name="T17">User</text:span><text:span text:style-name="T15">) peut constituer 0 ou </text:span><text:span text:style-name="T18">1 seul panier</text:span><text:span text:style-name="T15"> (</text:span><text:span text:style-name="T20">Cart</text:span><text:span text:style-name="T15">) </text:span><text:span text:style-name="T19">et 1 </text:span><text:span text:style-name="T18">panier</text:span><text:span text:style-name="T19"> appartient à 1 et 1 seul utilisateur :</text:span><text:span text:style-name="T15"> </text:span><text:span text:style-name="T17">User (0,</text:span><text:span text:style-name="T20">1</text:span><text:span text:style-name="T17">)-- constitue –(1,1) </text:span><text:span text:style-name="T20">Cart</text:span></text:p><text:p text:style-name="P17" loext:marker-style-name="T14"><text:span text:style-name="T15">Un </text:span><text:span text:style-name="T18">panier</text:span><text:span text:style-name="T15"> (</text:span><text:span text:style-name="T20">Cart</text:span><text:span text:style-name="T15">) peut contenir 1 ou plusieurs lignes (</text:span><text:span text:style-name="T20">Cart</text:span><text:span text:style-name="T17">Line</text:span><text:span text:style-name="T15">) e</text:span><text:span text:style-name="T19">t une ligne appartient à 1 et 1 seul</text:span><text:span text:style-name="T16"> </text:span><text:span text:style-name="T18">panier</text:span><text:span text:style-name="T19"> </text:span><text:span text:style-name="T15">: </text:span><text:span text:style-name="T20">Cart</text:span><text:span text:style-name="T17"> (1,N)--contient--(1,1) </text:span><text:span text:style-name="T20">Cart</text:span><text:span text:style-name="T17">Line</text:span></text:p><text:p text:style-name="P17" loext:marker-style-name="T14"><text:span text:style-name="T15">Une ligne (</text:span><text:span text:style-name="T20">Cart</text:span><text:span text:style-name="T17">Line</text:span><text:span text:style-name="T15">) concerne 1 et 1 seul produit (</text:span><text:span text:style-name="T17">Product</text:span><text:span text:style-name="T15">) </text:span><text:span text:style-name="T19">et 1 produit <text:s/>appartient à 0 ou plusieurs lignes </text:span><text:span text:style-name="T15">: </text:span><text:span text:style-name="T20">Cart</text:span><text:span text:style-name="T17">Line (1,1) –concerne--(0,N) Product</text:span></text:p><text:p text:style-name="P16" loext:marker-style-name="T14"/><text:p text:style-name="P17" loext:marker-style-name="T21"><text:span text:style-name="T20">Cart</text:span><text:span text:style-name="T17"> : </text:span><text:span text:style-name="T22">id , user, Status (« </text:span><text:span text:style-name="T23">open</text:span><text:span text:style-name="T22"> », « </text:span><text:span text:style-name="T30">converted </text:span><text:span text:style-name="T23">»</text:span><text:span text:style-name="T30">)</text:span></text:p><text:p text:style-name="P17" loext:marker-style-name="T21"><text:span text:style-name="T20">Cart</text:span><text:span text:style-name="T17">Line :</text:span><text:span text:style-name="T22"> id, </text:span><text:span text:style-name="T30">Cart</text:span><text:span text:style-name="T22">, Product, Quantity (integer) </text:span></text:p><text:p text:style-name="P17" loext:marker-style-name="T14"><text:span text:style-name="T15"/></text:p><text:p text:style-name="P19" loext:marker-style-name="T14"><text:span text:style-name="T15">En pratique, </text:span><text:span text:style-name="T18">pour constituer son panier, lorsque l’uti</text:span><text:span text:style-name="T15">lisateur </text:span><text:span text:style-name="T18">y </text:span><text:span text:style-name="T15">ajoute un produit :</text:span></text:p><text:list text:style-name="L4"><text:list-item><text:p text:style-name="P20" loext:marker-style-name="T14"><text:span text:style-name="T15">un nouveau panier est créé (s’il n’existe pas déjà)</text:span></text:p></text:list-item><text:list-item><text:p text:style-name="P20" loext:marker-style-name="T14">une nouvelle <text:span text:style-name="T9">Cart</text:span>Line est ajouté<text:span text:style-name="T31">e</text:span> dans ce panier auquel elle est liée.</text:p></text:list-item></text:list></draw:text-box></draw:frame>Paiement en ligne</text:p>
        </text:list-item>
      </text:list>
      <text:p text:style-name="P21"><text:soft-page-break/><text:span text:style-name="T32">1</text:span><text:span text:style-name="T33">) Constitution du panier</text:span></text:p>
      <text:p text:style-name="P22"/>
      <text:p text:style-name="P23"><text:span text:style-name="T34"><text:tab/></text:span><text:span text:style-name="T35">a</text:span><text:span text:style-name="T36">) </text:span><text:span text:style-name="T35">Ajouter un produit au panier</text:span></text:p>
      <text:p text:style-name="P24"/>
      <text:p text:style-name="P24">Ajouter à droite de la barre de navigation un panier avec un indicateur du nombre d’articles.</text:p>
      <text:p text:style-name="P24"><draw:frame draw:style-name="fr2" draw:name="Image1" text:anchor-type="char" svg:x="4.08cm" svg:y="0.139cm" svg:width="7.602cm" svg:height="1.069cm" draw:z-index="0"><draw:image xlink:href="Pictures/10000001000001EB000000453AA731E6.png" xlink:type="simple" xlink:show="embed" xlink:actuate="onLoad" draw:mime-type="image/png"/></draw:frame></text:p>
      <text:p text:style-name="P24"/>
      <text:p text:style-name="P24"/>
      <text:p text:style-name="P25">Dans la fiche d’un produit, si on clique sur « ajouter au panier » :</text:p>
      <text:list text:style-name="L5">
        <text:list-item>
          <text:p text:style-name="P26"><text:span text:style-name="T37">l’</text:span><text:span text:style-name="T38">indicateur du nombre d’articles </text:span><text:span text:style-name="T37">s’incrémente</text:span></text:p>
        </text:list-item>
      </text:list>
      <text:list text:style-name="L6">
        <text:list-item>
          <text:p text:style-name="P27">le panier est sauvegardé en session</text:p>
        </text:list-item>
      </text:list>
      <text:p text:style-name="P28"/>
      <text:p text:style-name="P29">Lorsqu’on clique sur <text:span text:style-name="T8">le </text:span>panier, <text:span text:style-name="T8">un panneau latéral (offcanvas) apparaît à droit</text:span><text:span text:style-name="T39">e</text:span><text:span text:style-name="T8"> de l’écran et récapitule la commande.</text:span></text:p>
      <text:p text:style-name="P28"><draw:frame draw:style-name="fr2" draw:name="Image2" text:anchor-type="char" svg:x="0cm" svg:y="0.254cm" svg:width="18.002cm" svg:height="5.075cm" draw:z-index="2"><draw:image xlink:href="Pictures/10000001000006F1000001F50E34398A.png" xlink:type="simple" xlink:show="embed" xlink:actuate="onLoad" draw:mime-type="image/png"/></draw:frame></text:p>
      <text:p text:style-name="P30">Aide à la réalisation :</text:p>
      <text:list text:style-name="L7">
        <text:list-item>
          <text:p text:style-name="P31"><text:span text:style-name="T40">Modifier le bouton </text:span>« ajouter au panier » <text:span text:style-name="T40">et créer le</text:span> CartController <text:span text:style-name="T40">avec la méthode </text:span>add() <text:span text:style-name="T41">pour</text:span><text:span text:style-name="T42"> enregistrer </text:span><text:span text:style-name="T40">en </text:span><text:span text:style-name="T42">session </text:span><text:span text:style-name="T40">dans « cart » </text:span><text:span text:style-name="T42">un produit </text:span>ajout<text:span text:style-name="T39">é</text:span> au panier.</text:p>
        </text:list-item>
        <text:list-item>
          <text:p text:style-name="P32">« cart » est un tableau qui <text:span text:style-name="T41">représente le panier et</text:span> stocke en clé l’id du produit ajouté et en valeur la quantité de ce produit.</text:p>
          <text:p text:style-name="P33">exemple :</text:p>
          <text:p text:style-name="P34"><text:bookmark text:name="sf-dump-1170512392 Copie 1"/>[</text:p>
        </text:list-item>
      </text:list>
      <text:p text:style-name="P35"><text:span text:style-name="Example"><text:s text:c="2"/><text:tab/><text:tab/></text:span></text:p>
      <text:p text:style-name="P35"><text:span text:style-name="Example"><text:tab/><text:tab/>8 =&gt; 1<text:tab/>// produit d’id 8 </text:span><text:span text:style-name="Example"><text:span text:style-name="T43">=&gt; 1 unité</text:span></text:span></text:p>
      <text:p text:style-name="P36"><text:span text:style-name="Example"><text:s text:c="2"/><text:tab/><text:tab/>29 =&gt; 2<text:tab/>// produit d’id 29 </text:span><text:span text:style-name="Example"><text:span text:style-name="T43">=&gt; 2 unité</text:span></text:span></text:p>
      <text:p text:style-name="P36"><text:span text:style-name="Example"><text:s text:c="2"/><text:tab/><text:tab/>13 =&gt; </text:span><text:span text:style-name="Example"><text:span text:style-name="T9">4</text:span></text:span><text:span text:style-name="Example"><text:tab/>// produit d’id 13 </text:span><text:span text:style-name="Example"><text:span text:style-name="T43">=&gt; 4 unité</text:span></text:span></text:p>
      <text:p text:style-name="P37"><text:tab/>]</text:p>
      <text:list xml:id="list132307510077590" text:continue-numbering="true" text:style-name="L7">
        <text:list-item>
          <text:p text:style-name="P32">Gérer les sessions : <text:a xlink:type="simple" xlink:href="https://symfony.com/doc/current/session.html" text:style-name="Internet_20_link" text:visited-style-name="Visited_20_Internet_20_Link">https://symfony.com/doc/current/session.html</text:a> </text:p>
          <text:p text:style-name="P32">- Pour récupérer <text:span text:style-name="T41">le panier </text:span>« cart » de<text:span text:style-name="T39">puis </text:span>la session (ou le créer s’il n’existe pas encore) : </text:p>
          <text:p text:style-name="P32"><text:span text:style-name="T44">$cart</text:span><text:span text:style-name="T45"> = </text:span><text:span text:style-name="T44">$session</text:span><text:span text:style-name="T45">-&gt;</text:span><text:span text:style-name="T46">get</text:span><text:span text:style-name="T45">(</text:span><text:span text:style-name="T47">'cart'</text:span><text:span text:style-name="T45">, []);</text:span></text:p>
        </text:list-item>
      </text:list>
      <text:p text:style-name="P38"><text:span text:style-name="T9"><text:tab/>- Pour modifier « cart » dans la session : </text:span><text:span text:style-name="T44">$session</text:span><text:span text:style-name="T45">-&gt;</text:span><text:span text:style-name="T46">set</text:span><text:span text:style-name="T45">(</text:span><text:span text:style-name="T47">'cart'</text:span><text:span text:style-name="T45">, </text:span><text:span text:style-name="T44">$cart</text:span><text:span text:style-name="T45">);</text:span></text:p>
      <text:list text:style-name="L8">
        <text:list-header>
          <text:p text:style-name="P39"><text:span text:style-name="T41">- Pour suivre l’évolution de votre panier, placer un dump de « cart » dans le contrôleur qui affiche tous les produits  : </text:span><text:span text:style-name="T46">dump</text:span><text:span text:style-name="T45">(</text:span><text:span text:style-name="T44">$session</text:span><text:span text:style-name="T45">-&gt;</text:span><text:span text:style-name="T46">get</text:span><text:span text:style-name="T45">(</text:span><text:span text:style-name="T47">'cart'</text:span><text:span text:style-name="T45">));</text:span></text:p>
          <text:p text:style-name="P40"><text:span text:style-name="T9">- </text:span><text:span text:style-name="T41">Pour vider le panier : <text:s/></text:span><text:span text:style-name="T44">$session</text:span><text:span text:style-name="T45">-&gt;</text:span><text:span text:style-name="T46">remove</text:span><text:span text:style-name="T45">(</text:span><text:span text:style-name="T47">'cart'</text:span><text:span text:style-name="T45">);</text:span></text:p>
        </text:list-header>
      </text:list>
      <text:list text:continue-list="list132307510077590" text:style-name="L7">
        <text:list-item>
          <text:p text:style-name="P41">Créer <text:span text:style-name="T40">la vue offcanva</text:span><text:span text:style-name="T39">s</text:span><text:span text:style-name="T40"> et</text:span> modifier l<text:span text:style-name="T40">a</text:span> vue barre de navigation</text:p>
        </text:list-item>
        <text:list-item>
          <text:p text:style-name="P41">Afficher le produit <text:span text:style-name="T48">dans le panier</text:span></text:p>
          <text:p text:style-name="P42">Pour cela on va créer une méthode getCart() dans un CartHandler qu’on pourra directement appeler dans notre offcanvas avec Twig <text:span text:style-name="T43">(voir doc symfony)</text:span></text:p>
        </text:list-item>
      </text:list>
      <text:p text:style-name="P28"><text:tab/><text:a xlink:type="simple" xlink:href="https://symfony.com/doc/current/templates.html#global-variables" text:style-name="Internet_20_link" text:visited-style-name="Visited_20_Internet_20_Link">https://symfony.com/doc/current/templates.html#global-variables</text:a></text:p>
      <text:p text:style-name="P28"/>
      <text:p text:style-name="P43"><text:tab/><text:span text:style-name="T33">b) Gestion du panier</text:span></text:p>
      <text:p text:style-name="P44"/>
      <text:p text:style-name="P44">Dans le offcanvas, activer les bouton -, +, 🗑️ et vider le panier.</text:p>
      <text:p text:style-name="P44">Ces boutons appellent <text:span text:style-name="T39">via </text:span>AJAX les méthodes de CartController (add, decrease, remove et clear)</text:p>
      <text:p text:style-name="P45"><text:soft-page-break/></text:p>
      <text:p text:style-name="P45"/>
      <text:p text:style-name="P45"/>
      <text:p text:style-name="P45"><text:tab/><text:span text:style-name="T49">c) 💪 Enregistrement en BDD du panier pour un utilisateur connecté</text:span></text:p>
      <text:p text:style-name="P45"/>
      <text:p text:style-name="P44">Afin que le panier de l’utilisateur soit conservé même après une déconnexion, on souhaite que le panier soit enregistré en BDD.</text:p>
      <text:p text:style-name="P44"/>
      <text:p text:style-name="P46">En pratique, <text:span text:style-name="T50">s</text:span>i l’<text:span text:style-name="T50">utilisateur</text:span> n’est pas connecté, <text:span text:style-name="T50">le panier</text:span> est <text:span text:style-name="T50">stocké</text:span> <text:span text:style-name="T51">uniquement</text:span> en session.</text:p>
      <text:p text:style-name="P47"><text:span text:style-name="T50">Alors que s’il </text:span><text:span text:style-name="T43">est connecté </text:span>le panier <text:span text:style-name="T50">n’</text:span>est <text:span text:style-name="T50">pas</text:span> stocké en session<text:span text:style-name="T43">, mais directement </text:span><text:span text:style-name="T50">et </text:span><text:span text:style-name="T52">uniquement</text:span><text:span text:style-name="T43"> </text:span><text:span text:style-name="T53">en BDD</text:span><text:span text:style-name="T43">.</text:span></text:p>
      <text:p text:style-name="P48"/>
      <text:p text:style-name="P48">⚠️ Attention, on a qu’une seule source de vérité.</text:p>
      <text:list text:style-name="L9">
        <text:list-item>
          <text:p text:style-name="P49">la session, si l’utilisateur n’est pas connecté</text:p>
        </text:list-item>
        <text:list-item>
          <text:p text:style-name="P49">la bdd, si l’utilisateur est connecté</text:p>
        </text:list-item>
      </text:list>
      <text:p text:style-name="P50">C’est l’un ou l’autre, mais <text:span text:style-name="T39">jamais</text:span> les deux en même temps.</text:p>
      <text:p text:style-name="P45"/>
      <text:p text:style-name="P51">Aide à la réalisation :</text:p>
      <text:p text:style-name="P52"/>
      <text:p text:style-name="P53">Dans les méthodes du CartController, il faut vérifier si l’utilisateur est connecté pour enregistrer en session ou en bdd.</text:p>
      <text:p text:style-name="P53"/>
      <text:p text:style-name="P46"><text:span text:style-name="T53">Dans le cas où l’utilisateur se connecte après avoir commencé </text:span><text:span text:style-name="T50">à</text:span><text:span text:style-name="T53"> constituer un panier, c</text:span>’est au moment de la connexion que le panier en session sera enregistré en BD<text:span text:style-name="T50">D.</text:span></text:p>
      <text:p text:style-name="P46"><text:span text:style-name="T53">Pour faire cela, on va utiliser un Event</text:span><text:span text:style-name="T50">Subscriber</text:span><text:span text:style-name="T53"> qui va écouter la connexion. </text:span><text:span text:style-name="T50">En cas de connexion, il va enregistrer en BDD un panier (s’il existe déjà en session) et le supprimer de la session.</text:span></text:p>
      <text:p text:style-name="P46"><text:a xlink:type="simple" xlink:href="https://symfony.com/doc/current/event_dispatcher.html#creating-an-event-subscriber" text:style-name="Internet_20_link" text:visited-style-name="Visited_20_Internet_20_Link">https://symfony.com/doc/current/event_dispatcher.html#creating-an-event-subscriber</text:a></text:p>
      <text:p text:style-name="P45"/>
      <text:p text:style-name="P45"><text:span text:style-name="T33">2) Tunnel de vente</text:span> </text:p>
      <text:p text:style-name="P45"/>
      <text:p text:style-name="P28"/>
      <text:p text:style-name="P28"/>
      <text:p text:style-name="P28"/>
      <text:p text:style-name="P28"/>
      <text:p text:style-name="P28"/>
      <text:p text:style-name="P28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5-07T13:23:05.668713367</dc:date>
    <meta:editing-duration>P1DT1H22M15S</meta:editing-duration>
    <meta:editing-cycles>40</meta:editing-cycles>
    <meta:generator>LibreOffice/26.2.2.2$Linux_X86_64 LibreOffice_project/620$Build-2</meta:generator>
    <meta:document-statistic meta:table-count="0" meta:image-count="2" meta:object-count="0" meta:page-count="3" meta:paragraph-count="82" meta:word-count="1000" meta:character-count="5813" meta:non-whitespace-character-count="4879"/>
  </office:meta>
</office:document-meta>
</file>