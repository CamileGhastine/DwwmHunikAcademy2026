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E000000A6D3DA8070.png" manifest:media-type="image/png"/>
  <manifest:file-entry manifest:full-path="Pictures/1000000100000512000003706AF7210A.png" manifest:media-type="image/png"/>
  <manifest:file-entry manifest:full-path="Pictures/100000010000052600000230D7E42B98.png" manifest:media-type="image/png"/>
  <manifest:file-entry manifest:full-path="Pictures/10000001000001E7000000CFDB06F59A.png" manifest:media-type="image/png"/>
  <manifest:file-entry manifest:full-path="Pictures/10000001000001CF0000003021C61D78.png" manifest:media-type="image/png"/>
  <manifest:file-entry manifest:full-path="Pictures/10000001000006CF000000594893F541.png" manifest:media-type="image/png"/>
  <manifest:file-entry manifest:full-path="Pictures/100000010000006900000030D94A49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4c4e0" officeooo:paragraph-rsid="0014c4e0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14c4e0" officeooo:paragraph-rsid="0014c4e0"/>
    </style:style>
    <style:style style:name="P3" style:family="paragraph" style:parent-style-name="Standard">
      <style:text-properties style:text-underline-style="none" fo:font-weight="normal" officeooo:rsid="0014c4e0" officeooo:paragraph-rsid="002d0c9b" style:font-weight-asian="normal" style:font-weight-complex="normal"/>
    </style:style>
    <style:style style:name="P4" style:family="paragraph" style:parent-style-name="Heading_20_3">
      <style:text-properties fo:font-size="12pt" style:text-underline-style="solid" style:text-underline-width="auto" style:text-underline-color="font-color" officeooo:paragraph-rsid="003cdb47" style:font-size-asian="12pt" style:font-size-complex="12pt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paragraph-rsid="003cdb47" fo:background-color="transparent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rsid="001bd7e4" officeooo:paragraph-rsid="003cdb47" fo:background-color="transparent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officeooo:paragraph-rsid="003f0a98" fo:background-color="transparent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3cdb47" fo:background-color="transparent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ad34c" officeooo:paragraph-rsid="001c23e2" style:font-weight-asian="bold" style:font-weight-complex="bold"/>
    </style:style>
    <style:style style:name="P10" style:family="paragraph" style:parent-style-name="Standard">
      <style:text-properties officeooo:paragraph-rsid="001c23e2"/>
    </style:style>
    <style:style style:name="P11" style:family="paragraph" style:parent-style-name="Standard">
      <style:text-properties officeooo:rsid="003cdb47" officeooo:paragraph-rsid="003cdb47"/>
    </style:style>
    <style:style style:name="P12" style:family="paragraph" style:parent-style-name="Standard">
      <style:text-properties officeooo:rsid="0042dfc5" officeooo:paragraph-rsid="0042dfc5"/>
    </style:style>
    <style:style style:name="P13" style:family="paragraph" style:parent-style-name="Standard" style:list-style-name="L2">
      <style:text-properties officeooo:rsid="0042dfc5" officeooo:paragraph-rsid="0042dfc5"/>
    </style:style>
    <style:style style:name="P14" style:family="paragraph" style:parent-style-name="Standard">
      <style:text-properties officeooo:rsid="0042dfc5" officeooo:paragraph-rsid="0044bff5"/>
    </style:style>
    <style:style style:name="P15" style:family="paragraph" style:parent-style-name="Standard">
      <style:text-properties officeooo:rsid="0014c4e0" officeooo:paragraph-rsid="003f0a98"/>
    </style:style>
    <style:style style:name="P16" style:family="paragraph" style:parent-style-name="Standard">
      <style:text-properties style:text-underline-style="none" fo:font-weight="normal" officeooo:rsid="003f0a98" officeooo:paragraph-rsid="003f0a98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45c6f4" officeooo:paragraph-rsid="0045c6f4" style:font-weight-asian="normal" style:font-weight-complex="normal"/>
    </style:style>
    <style:style style:name="P18" style:family="paragraph" style:parent-style-name="Standard">
      <style:text-properties officeooo:rsid="0042dfc5" officeooo:paragraph-rsid="004773ee"/>
    </style:style>
    <style:style style:name="P19" style:family="paragraph" style:parent-style-name="Standard">
      <style:text-properties officeooo:rsid="0042dfc5" officeooo:paragraph-rsid="0045c6f4"/>
    </style:style>
    <style:style style:name="T1" style:family="text">
      <style:text-properties officeooo:rsid="001ad34c"/>
    </style:style>
    <style:style style:name="T2" style:family="text">
      <style:text-properties officeooo:rsid="001da1bc"/>
    </style:style>
    <style:style style:name="T3" style:family="text">
      <style:text-properties officeooo:rsid="001ab7f8"/>
    </style:style>
    <style:style style:name="T4" style:family="text">
      <style:text-properties officeooo:rsid="001b8739"/>
    </style:style>
    <style:style style:name="T5" style:family="text">
      <style:text-properties officeooo:rsid="001bd7e4"/>
    </style:style>
    <style:style style:name="T6" style:family="text">
      <style:text-properties officeooo:rsid="003f0a98"/>
    </style:style>
    <style:style style:name="T7" style:family="text">
      <style:text-properties officeooo:rsid="001c23e2"/>
    </style:style>
    <style:style style:name="T8" style:family="text">
      <style:text-properties officeooo:rsid="003cdb47"/>
    </style:style>
    <style:style style:name="T9" style:family="text">
      <style:text-properties style:text-underline-style="solid" style:text-underline-width="auto" style:text-underline-color="font-color" fo:font-weight="bold" officeooo:rsid="001c23e2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3f0a98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3cdb47" style:font-weight-asian="bold" style:font-weight-complex="bold"/>
    </style:style>
    <style:style style:name="T13" style:family="text">
      <style:text-properties officeooo:rsid="0044bff5"/>
    </style:style>
    <style:style style:name="T14" style:family="text">
      <style:text-properties officeooo:rsid="0042dfc5"/>
    </style:style>
    <style:style style:name="T15" style:family="text">
      <style:text-properties officeooo:rsid="004773ee"/>
    </style:style>
    <style:style style:name="T16" style:family="text">
      <style:text-properties officeooo:rsid="0045c6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 e-commerce <text:span text:style-name="T1">Symfony</text:span> : <draw:frame draw:style-name="fr1" draw:name="Image4" text:anchor-type="char" svg:x="7.168cm" svg:y="0.736cm" svg:width="2.778cm" svg:height="1.27cm" draw:z-index="0"><draw:image xlink:href="Pictures/100000010000006900000030D94A4996.png" xlink:type="simple" xlink:show="embed" xlink:actuate="onLoad" draw:mime-type="image/png"/></draw:frame><text:span text:style-name="T2">Esprit Déco</text:span></text:p>
      <text:p text:style-name="P2"/>
      <text:p text:style-name="P3"/>
      <text:p text:style-name="P3"/>
      <text:h text:style-name="P4" text:outline-level="3">🟡 <text:span text:style-name="T3">Lot </text:span><text:span text:style-name="T4">2</text:span><text:span text:style-name="T3"> : </text:span><text:span text:style-name="T4">Back Office</text:span><text:span text:style-name="T3"> – </text:span><text:span text:style-name="T4">gestion des produits</text:span></text:h>
      <text:list text:style-name="L1">
        <text:list-item>
          <text:p text:style-name="P5"><text:span text:style-name="T4">Espace administrateur pour gérer les produit</text:span><text:span text:style-name="T5">s</text:span></text:p>
        </text:list-item>
        <text:list-item>
          <text:p text:style-name="P6"><text:span text:style-name="T6">S</text:span>uppression d’un produit</text:p>
        </text:list-item>
        <text:list-item>
          <text:p text:style-name="P6">Ajouter un produit</text:p>
        </text:list-item>
        <text:list-item>
          <text:p text:style-name="P6">Modifier un produit</text:p>
        </text:list-item>
        <text:list-item>
          <text:p text:style-name="P5"><text:span text:style-name="T4">Espace administrateur pour gérer les </text:span><text:span text:style-name="T5">catégories</text:span></text:p>
        </text:list-item>
        <text:list-item>
          <text:p text:style-name="P7"><text:span text:style-name="T4">Espace administrateur pour gérer les </text:span><text:span text:style-name="T6">utilisateurs</text:span></text:p>
        </text:list-item>
      </text:list>
      <text:p text:style-name="P8"/>
      <text:p text:style-name="P9"><text:span text:style-name="T7">1</text:span>) <text:span text:style-name="T8">Espace administrateur</text:span></text:p>
      <text:p text:style-name="P10"/>
      <text:p text:style-name="P11">Lorsqu’un user avec le rôle ROLE_ADMIN se connecte un un onglet « espace administrateur » s’affiche dans la barre de navigation.</text:p>
      <text:p text:style-name="P11"><draw:frame draw:style-name="fr2" draw:name="Image8" text:anchor-type="char" svg:width="12.25cm" svg:height="1.27cm" draw:z-index="1"><draw:image xlink:href="Pictures/10000001000001CF0000003021C61D78.png" xlink:type="simple" xlink:show="embed" xlink:actuate="onLoad" draw:mime-type="image/png"/></draw:frame></text:p>
      <text:p text:style-name="P11"/>
      <text:p text:style-name="P11"/>
      <text:p text:style-name="P11"/>
      <text:p text:style-name="P11">Lorsqu’on clique sur cet onglet, on arrive sur la page d’administration.</text:p>
      <text:p text:style-name="P11"><draw:frame draw:style-name="fr3" draw:name="Image1" text:anchor-type="char" svg:width="18.002cm" svg:height="7.648cm" draw:z-index="2"><draw:image xlink:href="Pictures/100000010000052600000230D7E42B98.png" xlink:type="simple" xlink:show="embed" xlink:actuate="onLoad" draw:mime-type="image/png"/></draw:frame></text:p>
      <text:p text:style-name="P2"><text:span text:style-name="T9">2</text:span><text:span text:style-name="T10">) </text:span><text:span text:style-name="T11">Gestion des produit : </text:span><text:span text:style-name="T12">Affich</text:span><text:span text:style-name="T11">a</text:span><text:span text:style-name="T12">g</text:span><text:span text:style-name="T11">e de tous les produits</text:span></text:p>
      <text:p text:style-name="P12">Lorsqu’on clique sur produit » de la page administrateur, on arrive sur la page qui permet de gérer tous les produits.</text:p>
      <text:p text:style-name="P12"/>
      <text:p text:style-name="P12">Tous les produits sont affichés dans un tableau comportant 5 colonnes :</text:p>
      <text:list text:style-name="L2">
        <text:list-item>
          <text:p text:style-name="P13">Titre du produit</text:p>
        </text:list-item>
        <text:list-item>
          <text:p text:style-name="P13">Prix</text:p>
        </text:list-item>
        <text:list-item>
          <text:p text:style-name="P13">catégorie</text:p>
        </text:list-item>
        <text:list-item>
          <text:p text:style-name="P13">Modifier ✏️</text:p>
        </text:list-item>
        <text:list-item>
          <text:p text:style-name="P13">Supprimer ❌</text:p>
        </text:list-item>
      </text:list>
      <text:p text:style-name="P12"/>
      <text:p text:style-name="P12">Au-dessus du tableau, se trouve un bouton ➕ pour ajouter des nouveaux produits. </text:p>
      <text:p text:style-name="P12"><draw:frame draw:style-name="fr3" draw:name="Image2" text:anchor-type="char" svg:width="18.002cm" svg:height="12.204cm" draw:z-index="3"><draw:image xlink:href="Pictures/1000000100000512000003706AF7210A.png" xlink:type="simple" xlink:show="embed" xlink:actuate="onLoad" draw:mime-type="image/png"/></draw:frame><text:soft-page-break/></text:p>
      <text:p text:style-name="P14">💪 L’entête du tableau est en bleu foncé. <text:span text:style-name="T13">Les couleurs des lignes du corps du tableau alternent entre le </text:span>gris claire <text:span text:style-name="T13">et le </text:span>gris foncé.</text:p>
      <text:p text:style-name="P2"/>
      <text:p text:style-name="P15"><text:span text:style-name="T11">3</text:span><text:span text:style-name="T10">) </text:span><text:span text:style-name="T11">Gestion des produit : Suppression d’un produit</text:span><draw:frame draw:style-name="fr1" draw:name="Image5" text:anchor-type="char" svg:x="12.129cm" svg:y="0.268cm" svg:width="5.59cm" svg:height="2.009cm" draw:z-index="5"><draw:image xlink:href="Pictures/10000001000001CE000000A6D3DA8070.png" xlink:type="simple" xlink:show="embed" xlink:actuate="onLoad" draw:mime-type="image/png"/></draw:frame></text:p>
      <text:p text:style-name="P16"/>
      <text:p text:style-name="P17">Lorsque l’on clique sur <text:span text:style-name="T14">❌, </text:span>une confirmation Javascript est demandé.</text:p>
      <text:p text:style-name="P17"/>
      <text:p text:style-name="P17"/>
      <text:p text:style-name="P17">En cas de confirmation, le produit est supprimé et un message flash s’affiche sous la barre de navigation.</text:p>
      <text:p text:style-name="P17"><draw:frame draw:style-name="fr1" draw:name="Image3" text:anchor-type="char" svg:x="0.111cm" svg:y="0.27cm" svg:width="11.044cm" svg:height="0.564cm" draw:z-index="4"><draw:image xlink:href="Pictures/10000001000006CF000000594893F541.png" xlink:type="simple" xlink:show="embed" xlink:actuate="onLoad" draw:mime-type="image/png"/></draw:frame></text:p>
      <text:p text:style-name="P17"><draw:frame draw:style-name="fr1" draw:name="Image6" text:anchor-type="char" svg:x="11.582cm" svg:y="0.24cm" svg:width="5.771cm" svg:height="2.454cm" draw:z-index="6"><draw:image xlink:href="Pictures/10000001000001E7000000CFDB06F59A.png" xlink:type="simple" xlink:show="embed" xlink:actuate="onLoad" draw:mime-type="image/png"/></draw:frame></text:p>
      <text:p text:style-name="P18"/>
      <text:p text:style-name="P18">💪 <text:span text:style-name="T15">Remplacer la confirmation Javascript par une modal.</text:span></text:p>
      <text:p text:style-name="P17"/>
      <text:p text:style-name="P17"/>
      <text:p text:style-name="P17"/>
      <text:p text:style-name="P19">💪 <text:span text:style-name="T16">Protéger vous contre la faille CSRF sur la suppression du produit.</text:span></text:p>
      <text:p text:style-name="P16"/>
      <text:p text:style-name="P15"><text:span text:style-name="T11">4</text:span><text:span text:style-name="T10">) </text:span><text:span text:style-name="T11">Gestion des produit : Ajout d’un produit</text:span></text:p>
      <text:p text:style-name="P16"/>
      <text:p text:style-name="P16"/>
      <text:p text:style-name="P16"/>
      <text:p text:style-name="P16"/>
      <text:p text:style-name="P15"><text:span text:style-name="T11">5</text:span><text:span text:style-name="T10">) </text:span><text:span text:style-name="T11">Gestion des produit : Mise à jour d’un produit</text:span></text:p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14:48:03.583685816</meta:creation-date>
    <dc:date>2026-04-29T15:33:05.535894261</dc:date>
    <meta:editing-duration>PT7H21M46S</meta:editing-duration>
    <meta:editing-cycles>25</meta:editing-cycles>
    <meta:generator>LibreOffice/26.2.2.2$Linux_X86_64 LibreOffice_project/620$Build-2</meta:generator>
    <meta:document-statistic meta:table-count="0" meta:image-count="7" meta:object-count="0" meta:page-count="2" meta:paragraph-count="28" meta:word-count="252" meta:character-count="1460" meta:non-whitespace-character-count="1245"/>
  </office:meta>
</office:document-meta>
</file>