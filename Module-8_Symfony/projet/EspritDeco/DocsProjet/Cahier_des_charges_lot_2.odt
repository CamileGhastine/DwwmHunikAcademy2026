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5000002B82D412FBD.png" manifest:media-type="image/png"/>
  <manifest:file-entry manifest:full-path="Pictures/1000000100000547000002BD503B8335.png" manifest:media-type="image/png"/>
  <manifest:file-entry manifest:full-path="Pictures/10000001000001CE000000A6D3DA8070.png" manifest:media-type="image/png"/>
  <manifest:file-entry manifest:full-path="Pictures/1000000100000561000001280DD5A567.png" manifest:media-type="image/png"/>
  <manifest:file-entry manifest:full-path="Pictures/1000000100000512000003706AF7210A.png" manifest:media-type="image/png"/>
  <manifest:file-entry manifest:full-path="Pictures/10000001000000810000003F5643C658.png" manifest:media-type="image/png"/>
  <manifest:file-entry manifest:full-path="Pictures/100000010000052600000230D7E42B98.png" manifest:media-type="image/png"/>
  <manifest:file-entry manifest:full-path="Pictures/10000001000001E7000000CFDB06F59A.png" manifest:media-type="image/png"/>
  <manifest:file-entry manifest:full-path="Pictures/10000001000001CF0000003021C61D78.png" manifest:media-type="image/png"/>
  <manifest:file-entry manifest:full-path="Pictures/10000001000006CF000000594893F541.png" manifest:media-type="image/png"/>
  <manifest:file-entry manifest:full-path="Pictures/100000010000006900000030D94A49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4c4e0" officeooo:paragraph-rsid="0014c4e0"/>
    </style:style>
    <style:style style:name="P3" style:family="paragraph" style:parent-style-name="Standard">
      <style:text-properties style:text-underline-style="none" fo:font-weight="normal" officeooo:rsid="0014c4e0" officeooo:paragraph-rsid="002d0c9b" style:font-weight-asian="normal" style:font-weight-complex="normal"/>
    </style:style>
    <style:style style:name="P4" style:family="paragraph" style:parent-style-name="Heading_20_3">
      <style:text-properties fo:font-size="12pt" style:text-underline-style="solid" style:text-underline-width="auto" style:text-underline-color="font-color" officeooo:paragraph-rsid="003cdb47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3cdb47" fo:background-color="transparen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1bd7e4" officeooo:paragraph-rsid="003cdb47" fo:background-color="transparent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3cdb47" fo:background-color="transparent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ad34c" officeooo:paragraph-rsid="001c23e2" style:font-weight-asian="bold" style:font-weight-complex="bold"/>
    </style:style>
    <style:style style:name="P9" style:family="paragraph" style:parent-style-name="Standard">
      <style:text-properties officeooo:paragraph-rsid="001c23e2"/>
    </style:style>
    <style:style style:name="P10" style:family="paragraph" style:parent-style-name="Standard">
      <style:text-properties officeooo:rsid="003cdb47" officeooo:paragraph-rsid="003cdb47"/>
    </style:style>
    <style:style style:name="P11" style:family="paragraph" style:parent-style-name="Standard">
      <style:text-properties officeooo:rsid="00494451" officeooo:paragraph-rsid="00494451"/>
    </style:style>
    <style:style style:name="P12" style:family="paragraph" style:parent-style-name="Standard">
      <style:text-properties officeooo:rsid="003cdb47" officeooo:paragraph-rsid="00494451"/>
    </style:style>
    <style:style style:name="P13" style:family="paragraph" style:parent-style-name="Standard">
      <style:text-properties officeooo:rsid="0042dfc5" officeooo:paragraph-rsid="0042dfc5"/>
    </style:style>
    <style:style style:name="P14" style:family="paragraph" style:parent-style-name="Standard" style:list-style-name="L2">
      <style:text-properties officeooo:rsid="0042dfc5" officeooo:paragraph-rsid="0042dfc5"/>
    </style:style>
    <style:style style:name="P15" style:family="paragraph" style:parent-style-name="Standard">
      <style:text-properties officeooo:rsid="004add5a" officeooo:paragraph-rsid="004add5a"/>
    </style:style>
    <style:style style:name="P16" style:family="paragraph" style:parent-style-name="Standard">
      <style:text-properties officeooo:rsid="0042dfc5" officeooo:paragraph-rsid="0044bff5"/>
    </style:style>
    <style:style style:name="P17" style:family="paragraph" style:parent-style-name="Standard">
      <style:text-properties officeooo:paragraph-rsid="004bae2e"/>
    </style:style>
    <style:style style:name="P18" style:family="paragraph" style:parent-style-name="Standard">
      <style:text-properties officeooo:rsid="0014c4e0" officeooo:paragraph-rsid="004add5a"/>
    </style:style>
    <style:style style:name="P19" style:family="paragraph" style:parent-style-name="Standard">
      <style:text-properties officeooo:rsid="0014c4e0" officeooo:paragraph-rsid="003f0a98"/>
    </style:style>
    <style:style style:name="P20" style:family="paragraph" style:parent-style-name="Standard">
      <style:text-properties style:text-underline-style="none" fo:font-weight="normal" officeooo:rsid="003f0a98" officeooo:paragraph-rsid="003f0a9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5c6f4" officeooo:paragraph-rsid="0045c6f4" style:font-weight-asian="normal" style:font-weight-complex="normal"/>
    </style:style>
    <style:style style:name="P22" style:family="paragraph" style:parent-style-name="Standard">
      <style:text-properties officeooo:rsid="0042dfc5" officeooo:paragraph-rsid="004773ee"/>
    </style:style>
    <style:style style:name="P23" style:family="paragraph" style:parent-style-name="Standard">
      <style:text-properties officeooo:rsid="0042dfc5" officeooo:paragraph-rsid="0045c6f4"/>
    </style:style>
    <style:style style:name="P24" style:family="paragraph" style:parent-style-name="Standard">
      <style:text-properties style:text-underline-style="none" fo:font-weight="normal" officeooo:rsid="004949ea" officeooo:paragraph-rsid="004bae2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4949ea" officeooo:paragraph-rsid="004949ea" style:font-weight-asian="normal" style:font-weight-complex="normal"/>
    </style:style>
    <style:style style:name="P26" style:family="paragraph" style:parent-style-name="Standard" style:list-style-name="L3">
      <style:text-properties style:text-underline-style="none" fo:font-weight="normal" officeooo:rsid="004949ea" officeooo:paragraph-rsid="004949ea" style:font-weight-asian="normal" style:font-weight-complex="normal"/>
    </style:style>
    <style:style style:name="P27" style:family="paragraph" style:parent-style-name="Standard" style:list-style-name="L3">
      <style:text-properties officeooo:rsid="0042dfc5" officeooo:paragraph-rsid="004949ea"/>
    </style:style>
    <style:style style:name="P28" style:family="paragraph" style:parent-style-name="Standard">
      <style:text-properties style:text-underline-style="none" fo:font-weight="normal" officeooo:rsid="003f0a98" officeooo:paragraph-rsid="004bae2e" style:font-weight-asian="normal" style:font-weight-complex="normal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officeooo:rsid="001ab7f8"/>
    </style:style>
    <style:style style:name="T4" style:family="text">
      <style:text-properties officeooo:rsid="001b8739"/>
    </style:style>
    <style:style style:name="T5" style:family="text">
      <style:text-properties officeooo:rsid="001bd7e4"/>
    </style:style>
    <style:style style:name="T6" style:family="text">
      <style:text-properties officeooo:rsid="003f0a98"/>
    </style:style>
    <style:style style:name="T7" style:family="text">
      <style:text-properties officeooo:rsid="001c23e2"/>
    </style:style>
    <style:style style:name="T8" style:family="text">
      <style:text-properties officeooo:rsid="003cdb47"/>
    </style:style>
    <style:style style:name="T9" style:family="text">
      <style:text-properties officeooo:rsid="004949ea"/>
    </style:style>
    <style:style style:name="T10" style:family="text">
      <style:text-properties officeooo:rsid="0014c4e0"/>
    </style:style>
    <style:style style:name="T11" style:family="text">
      <style:text-properties style:text-underline-style="solid" style:text-underline-width="auto" style:text-underline-color="font-color" fo:font-weight="bold" officeooo:rsid="001c23e2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f0a98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4add5a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cdb47" style:font-weight-asian="bold" style:font-weight-complex="bold"/>
    </style:style>
    <style:style style:name="T16" style:family="text">
      <style:text-properties officeooo:rsid="004add5a"/>
    </style:style>
    <style:style style:name="T17" style:family="text">
      <style:text-properties officeooo:rsid="004aabb7"/>
    </style:style>
    <style:style style:name="T18" style:family="text">
      <style:text-properties officeooo:rsid="0044bff5"/>
    </style:style>
    <style:style style:name="T19" style:family="text">
      <style:text-properties officeooo:rsid="0042dfc5"/>
    </style:style>
    <style:style style:name="T20" style:family="text">
      <style:text-properties officeooo:rsid="004773ee"/>
    </style:style>
    <style:style style:name="T21" style:family="text">
      <style:text-properties officeooo:rsid="0045c6f4"/>
    </style:style>
    <style:style style:name="T22" style:family="text">
      <style:text-properties officeooo:rsid="004bae2e"/>
    </style:style>
    <style:style style:name="T23" style:family="text">
      <style:text-properties style:text-underline-style="solid" style:text-underline-width="auto" style:text-underline-color="font-color" fo:font-weight="bold" officeooo:rsid="004949e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draw:frame draw:style-name="fr1" draw:name="Image4" text:anchor-type="char" svg:x="7.168cm" svg:y="0.736cm" svg:width="2.778cm" svg:height="1.27cm" draw:z-index="0"><draw:image xlink:href="Pictures/100000010000006900000030D94A4996.png" xlink:type="simple" xlink:show="embed" xlink:actuate="onLoad" draw:mime-type="image/png"/></draw:frame><text:span text:style-name="T2">Esprit Déco</text:span></text:p>
      <text:p text:style-name="P2"/>
      <text:p text:style-name="P3"/>
      <text:p text:style-name="P3"/>
      <text:h text:style-name="P4" text:outline-level="3">🟡 <text:span text:style-name="T3">Lot </text:span><text:span text:style-name="T4">2</text:span><text:span text:style-name="T3"> : </text:span><text:span text:style-name="T4">Back Office</text:span><text:span text:style-name="T3"> – </text:span><text:span text:style-name="T4">gestion des produits</text:span></text:h>
      <text:list text:style-name="L1">
        <text:list-item>
          <text:p text:style-name="P5"><text:span text:style-name="T4">Espace administrateur pour gérer les produit</text:span><text:span text:style-name="T5">s</text:span></text:p>
        </text:list-item>
        <text:list-item>
          <text:p text:style-name="P6"><text:span text:style-name="T6">S</text:span>uppression d’un produit</text:p>
        </text:list-item>
        <text:list-item>
          <text:p text:style-name="P6">Ajouter un produit</text:p>
        </text:list-item>
        <text:list-item>
          <text:p text:style-name="P6">Modifier un produit</text:p>
        </text:list-item>
      </text:list>
      <text:p text:style-name="P7"/>
      <text:p text:style-name="P8"><text:span text:style-name="T7">1</text:span>) <text:span text:style-name="T8">Espace administrateur</text:span></text:p>
      <text:p text:style-name="P9"/>
      <text:p text:style-name="P10">Lorsqu’un <text:span text:style-name="T9">utilisateur</text:span> avec le rôle ROLE_ADMIN se connecte, un onglet « espace administrateur » s’affiche dans la barre de navigation.</text:p>
      <text:p text:style-name="P10"><draw:frame draw:style-name="fr2" draw:name="Image8" text:anchor-type="char" svg:width="12.25cm" svg:height="1.27cm" draw:z-index="1"><draw:image xlink:href="Pictures/10000001000001CF0000003021C61D78.png" xlink:type="simple" xlink:show="embed" xlink:actuate="onLoad" draw:mime-type="image/png"/></draw:frame></text:p>
      <text:p text:style-name="P10"/>
      <text:p text:style-name="P10"/>
      <text:p text:style-name="P10"/>
      <text:p text:style-name="P10">Lorsqu’on clique sur cet onglet, on arrive sur la page d’administration.</text:p>
      <text:p text:style-name="P10"><draw:frame draw:style-name="fr1" draw:name="Image1" text:anchor-type="char" svg:x="0cm" svg:y="0.205cm" svg:width="18.002cm" svg:height="7.648cm" draw:z-index="2"><draw:image xlink:href="Pictures/100000010000052600000230D7E42B98.png" xlink:type="simple" xlink:show="embed" xlink:actuate="onLoad" draw:mime-type="image/png"/></draw:frame></text:p>
      <text:p text:style-name="P11"><text:span text:style-name="T10">⚠️ </text:span>La gestion des catégories et des utilisateurs ne seront pas traitées ici.</text:p>
      <text:p text:style-name="P12"/>
      <text:p text:style-name="P2"><text:span text:style-name="T11">2</text:span><text:span text:style-name="T12">) </text:span><text:span text:style-name="T13">Gestion des produit</text:span><text:span text:style-name="T14">s</text:span><text:span text:style-name="T13"> : </text:span><text:span text:style-name="T15">Affich</text:span><text:span text:style-name="T13">a</text:span><text:span text:style-name="T15">g</text:span><text:span text:style-name="T13">e de tous les produits</text:span></text:p>
      <text:p text:style-name="P13">Lorsqu’on clique sur « <text:span text:style-name="T16">P</text:span>roduit » de la page administrateur, on arrive sur la page permet<text:span text:style-name="T17">tant</text:span> de gérer tous les produits.</text:p>
      <text:p text:style-name="P13"/>
      <text:p text:style-name="P13">Tous les produits sont affichés dans un tableau comportant 5 colonnes :</text:p>
      <text:list text:style-name="L2">
        <text:list-item>
          <text:p text:style-name="P14">Titre du produit <text:span text:style-name="T16">(cliquable et renvoyant vers la fiche produit)</text:span></text:p>
        </text:list-item>
        <text:list-item>
          <text:p text:style-name="P14">Prix</text:p>
        </text:list-item>
        <text:list-item>
          <text:p text:style-name="P14"><text:span text:style-name="T9">C</text:span>atégorie</text:p>
        </text:list-item>
        <text:list-item>
          <text:p text:style-name="P14">Modifier ✏️</text:p>
        </text:list-item>
        <text:list-item>
          <text:p text:style-name="P14">Supprimer ❌</text:p>
        </text:list-item>
      </text:list>
      <text:p text:style-name="P13"/>
      <text:p text:style-name="P13">Au-dessus du tableau se trouve un bouton ➕ pour ajouter de nouveaux produits.</text:p>
      <text:p text:style-name="P15">Sous le tableau se trouve un bouton qui permet de revenir à la page précédente <draw:frame draw:style-name="fr1" draw:name="Image10" text:anchor-type="char" svg:x="15.189cm" svg:y="0.176cm" svg:width="1.931cm" svg:height="0.944cm" draw:z-index="8"><draw:image xlink:href="Pictures/10000001000000810000003F5643C658.png" xlink:type="simple" xlink:show="embed" xlink:actuate="onLoad" draw:mime-type="image/png"/></draw:frame>(l’espace administrateur)</text:p>
      <text:p text:style-name="P13"><draw:frame draw:style-name="fr3" draw:name="Image2" text:anchor-type="char" svg:width="18.002cm" svg:height="12.204cm" draw:z-index="3"><draw:image xlink:href="Pictures/1000000100000512000003706AF7210A.png" xlink:type="simple" xlink:show="embed" xlink:actuate="onLoad" draw:mime-type="image/png"/></draw:frame><text:soft-page-break/></text:p>
      <text:p text:style-name="P16">💪 L’entête du tableau est en bleu foncé. <text:span text:style-name="T18">Les couleurs des lignes du corps du tableau alternent entre le </text:span>gris claire <text:span text:style-name="T18">et le </text:span>gris foncé.</text:p>
      <text:p text:style-name="P16"/>
      <text:p text:style-name="P17"><text:span text:style-name="T19">💪 </text:span>Ajouter dans la fiche produit un bouton de retour permettant de revenir à la page précédente (⚠️ l’utilisateur peut accéder à la fiche produit par plusieurs chemins).</text:p>
      <text:p text:style-name="P18"><draw:frame draw:style-name="fr1" draw:name="Image9" text:anchor-type="char" svg:x="0cm" svg:y="0.243cm" svg:width="18.002cm" svg:height="3.868cm" draw:z-index="9"><draw:image xlink:href="Pictures/1000000100000561000001280DD5A567.png" xlink:type="simple" xlink:show="embed" xlink:actuate="onLoad" draw:mime-type="image/png"/></draw:frame></text:p>
      <text:p text:style-name="P19"><text:span text:style-name="T13">3</text:span><text:span text:style-name="T12">) </text:span><text:span text:style-name="T13">Gestion des produit</text:span><text:span text:style-name="T14">s</text:span><text:span text:style-name="T13"> : Suppression d’un produit</text:span><draw:frame draw:style-name="fr1" draw:name="Image5" text:anchor-type="char" svg:x="12.129cm" svg:y="0.268cm" svg:width="5.59cm" svg:height="2.009cm" draw:z-index="5"><draw:image xlink:href="Pictures/10000001000001CE000000A6D3DA8070.png" xlink:type="simple" xlink:show="embed" xlink:actuate="onLoad" draw:mime-type="image/png"/></draw:frame></text:p>
      <text:p text:style-name="P20"/>
      <text:p text:style-name="P21">Lorsque l’on clique sur <text:span text:style-name="T19">❌, </text:span>une confirmation Java<text:span text:style-name="T9">S</text:span>cript est demandé<text:span text:style-name="T16">e</text:span>.</text:p>
      <text:p text:style-name="P21"/>
      <text:p text:style-name="P21"/>
      <text:p text:style-name="P21"><text:span text:style-name="T16">Si l’utilisateur confirme</text:span>, le produit est supprimé et un message flash s’affiche sous la barre de navigation.</text:p>
      <text:p text:style-name="P21"><draw:frame draw:style-name="fr1" draw:name="Image3" text:anchor-type="char" svg:x="0.111cm" svg:y="0.27cm" svg:width="11.044cm" svg:height="0.564cm" draw:z-index="4"><draw:image xlink:href="Pictures/10000001000006CF000000594893F541.png" xlink:type="simple" xlink:show="embed" xlink:actuate="onLoad" draw:mime-type="image/png"/></draw:frame></text:p>
      <text:p text:style-name="P21"><draw:frame draw:style-name="fr1" draw:name="Image6" text:anchor-type="char" svg:x="11.582cm" svg:y="0.24cm" svg:width="5.771cm" svg:height="2.454cm" draw:z-index="6"><draw:image xlink:href="Pictures/10000001000001E7000000CFDB06F59A.png" xlink:type="simple" xlink:show="embed" xlink:actuate="onLoad" draw:mime-type="image/png"/></draw:frame></text:p>
      <text:p text:style-name="P22"/>
      <text:p text:style-name="P22">💪 <text:span text:style-name="T20">Remplacer la confirmation Java</text:span><text:span text:style-name="T9">S</text:span><text:span text:style-name="T20">cript par une modal</text:span><text:span text:style-name="T9">e</text:span><text:span text:style-name="T20">.</text:span></text:p>
      <text:p text:style-name="P21"/>
      <text:p text:style-name="P21"/>
      <text:p text:style-name="P21"/>
      <text:p text:style-name="P23">💪 <text:span text:style-name="T21">Protége</text:span><text:span text:style-name="T16">z-</text:span><text:span text:style-name="T21">vous contre </text:span><text:span text:style-name="T16">les attaques</text:span><text:span text:style-name="T21"> CSRF sur la suppression du produit.</text:span></text:p>
      <text:p text:style-name="P19"><text:soft-page-break/><text:span text:style-name="T13">4</text:span><text:span text:style-name="T12">) </text:span><text:span text:style-name="T13">Gestion des produit</text:span><text:span text:style-name="T14">s</text:span><text:span text:style-name="T13"> : Ajout d’un produit</text:span><draw:frame draw:style-name="fr1" draw:name="Image7" text:anchor-type="char" svg:x="8.403cm" svg:y="0.159cm" svg:width="9.4cm" svg:height="4.413cm" draw:z-index="7"><draw:image xlink:href="Pictures/1000000100000547000002BD503B8335.png" xlink:type="simple" xlink:show="embed" xlink:actuate="onLoad" draw:mime-type="image/png"/></draw:frame></text:p>
      <text:p text:style-name="P20"/>
      <text:p text:style-name="P24">Lorsque l’on clique sur <text:span text:style-name="T19">➕, </text:span>on arrive sur le formulaire de création de produit.</text:p>
      <text:p text:style-name="P20"/>
      <text:p text:style-name="P25">le formulaire de création de produit contient les champs :</text:p>
      <text:list text:style-name="L3">
        <text:list-item>
          <text:p text:style-name="P26">Titre (obligatoire, minimum 3 caractères)</text:p>
        </text:list-item>
        <text:list-item>
          <text:p text:style-name="P26">Description (textarea, obligatoire)</text:p>
        </text:list-item>
        <text:list-item>
          <text:p text:style-name="P26">Prix (obligatoire et positif)</text:p>
        </text:list-item>
        <text:list-item>
          <text:p text:style-name="P26">Catégorie (obligatoire dans un menu déroulant) </text:p>
        </text:list-item>
        <text:list-item>
          <text:p text:style-name="P27">💪 <text:span text:style-name="T9">Image (optionnel</text:span><text:span text:style-name="T16">le</text:span><text:span text:style-name="T9">, champ d’upload</text:span><text:span text:style-name="T22">)</text:span><text:span text:style-name="T9"> ou </text:span>💪💪 <text:span text:style-name="T22">(</text:span><text:span text:style-name="T9">champ d’upload mulitple)</text:span></text:p>
        </text:list-item>
      </text:list>
      <text:p text:style-name="P20"/>
      <text:p text:style-name="P19"><text:span text:style-name="T13">5</text:span><text:span text:style-name="T12">) </text:span><text:span text:style-name="T13">Gestion des produit</text:span><text:span text:style-name="T23">s</text:span><text:span text:style-name="T13"> : Mise à jour d’un produit</text:span></text:p>
      <text:p text:style-name="P20"/>
      <text:p text:style-name="P28">Lorsque l’on clique sur ✏️, on accède au formulaire de modification d’un produit.<text:line-break/>Les champs sont préremplis avec les valeurs modifiables.</text:p>
      <text:p text:style-name="P20"><draw:frame draw:style-name="fr1" draw:name="Image11" text:anchor-type="char" svg:x="0cm" svg:y="0.198cm" svg:width="18.002cm" svg:height="9.287cm" draw:z-index="10"><draw:image xlink:href="Pictures/1000000100000545000002B82D412FBD.png" xlink:type="simple" xlink:show="embed" xlink:actuate="onLoad" draw:mime-type="image/png"/></draw:frame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4-30T15:45:58.343017435</dc:date>
    <meta:editing-duration>PT7H41M50S</meta:editing-duration>
    <meta:editing-cycles>27</meta:editing-cycles>
    <meta:generator>LibreOffice/26.2.2.2$Linux_X86_64 LibreOffice_project/620$Build-2</meta:generator>
    <meta:document-statistic meta:table-count="0" meta:image-count="11" meta:object-count="0" meta:page-count="3" meta:paragraph-count="37" meta:word-count="378" meta:character-count="2270" meta:non-whitespace-character-count="1941"/>
  </office:meta>
</office:document-meta>
</file>