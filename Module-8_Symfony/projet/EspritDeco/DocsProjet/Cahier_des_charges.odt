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fo:font-weight="bold" officeooo:rsid="0014c4e0" officeooo:paragraph-rsid="0014c4e0" style:font-weight-asian="bold" style:font-weight-complex="bold"/>
    </style:style>
    <style:style style:name="P15" style:family="paragraph" style:parent-style-name="Standard">
      <style:text-properties style:text-underline-style="solid" style:text-underline-width="auto" style:text-underline-color="font-color" officeooo:rsid="0014c4e0" officeooo:paragraph-rsid="0014c4e0"/>
    </style:style>
    <style:style style:name="P16" style:family="paragraph" style:parent-style-name="Standard">
      <style:text-properties officeooo:rsid="000fa58c" officeooo:paragraph-rsid="000fa58c"/>
    </style:style>
    <style:style style:name="P17" style:family="paragraph" style:parent-style-name="Standard" style:list-style-name="L3">
      <style:text-properties officeooo:paragraph-rsid="0014c4e0"/>
    </style:style>
    <style:style style:name="P18" style:family="paragraph" style:parent-style-name="Standard">
      <style:text-properties officeooo:paragraph-rsid="001849cb"/>
    </style:style>
    <style:style style:name="P19" style:family="paragraph" style:parent-style-name="Standard">
      <style:text-properties officeooo:rsid="001849cb" officeooo:paragraph-rsid="0014c4e0"/>
    </style:style>
    <style:style style:name="P20" style:family="paragraph" style:parent-style-name="Standard">
      <style:text-properties officeooo:rsid="001849cb" officeooo:paragraph-rsid="001849cb"/>
    </style:style>
    <style:style style:name="P21" style:family="paragraph" style:parent-style-name="Standard" style:list-style-name="L4">
      <style:text-properties officeooo:rsid="001849cb" officeooo:paragraph-rsid="00290227"/>
    </style:style>
    <style:style style:name="P22" style:family="paragraph" style:parent-style-name="Standard" style:list-style-name="L5">
      <style:text-properties officeooo:rsid="001849cb" officeooo:paragraph-rsid="001849cb"/>
    </style:style>
    <style:style style:name="P23" style:family="paragraph" style:parent-style-name="Standard">
      <style:text-properties officeooo:rsid="00290227" officeooo:paragraph-rsid="00290227"/>
    </style:style>
    <style:style style:name="P24" style:family="paragraph" style:parent-style-name="Standard">
      <style:text-properties fo:font-size="8pt" officeooo:rsid="001849cb" officeooo:paragraph-rsid="001849cb" style:font-size-asian="8pt" style:font-size-complex="8pt"/>
    </style:style>
    <style:style style:name="P25" style:family="paragraph" style:parent-style-name="Standard">
      <style:text-properties officeooo:paragraph-rsid="002b45ce"/>
    </style:style>
    <style:style style:name="P26" style:family="paragraph" style:parent-style-name="Standard">
      <style:text-properties officeooo:rsid="001ead03" officeooo:paragraph-rsid="002b45ce"/>
    </style:style>
    <style:style style:name="P27" style:family="paragraph" style:parent-style-name="Standard">
      <style:text-properties style:text-underline-style="solid" style:text-underline-width="auto" style:text-underline-color="font-color" officeooo:rsid="002b45ce" officeooo:paragraph-rsid="002c8cf2"/>
    </style:style>
    <style:style style:name="P28" style:family="paragraph" style:parent-style-name="Standard">
      <style:text-properties officeooo:rsid="002b45ce" officeooo:paragraph-rsid="002c8cf2"/>
    </style:style>
    <style:style style:name="P29" style:family="paragraph" style:parent-style-name="Standard" style:list-style-name="L6">
      <style:text-properties officeooo:rsid="002b45ce" officeooo:paragraph-rsid="002b45ce"/>
    </style:style>
    <style:style style:name="P30" style:family="paragraph" style:parent-style-name="Standard" style:list-style-name="L6">
      <style:text-properties officeooo:rsid="002b45ce" officeooo:paragraph-rsid="002d0c9b"/>
    </style:style>
    <style:style style:name="P31" style:family="paragraph" style:parent-style-name="Standard">
      <style:text-properties style:text-underline-style="solid" style:text-underline-width="auto" style:text-underline-color="font-color" fo:font-weight="bold" officeooo:rsid="001d7660" officeooo:paragraph-rsid="002b45ce" fo:background-color="transparent" style:font-weight-asian="bold" style:font-weight-complex="bold"/>
    </style:style>
    <style:style style:name="P32" style:family="paragraph" style:parent-style-name="Standard">
      <style:text-properties officeooo:rsid="001849cb" officeooo:paragraph-rsid="002d0c9b"/>
    </style:style>
    <style:style style:name="P33" style:family="paragraph" style:parent-style-name="Standard" style:list-style-name="L4">
      <style:text-properties officeooo:rsid="001849cb" officeooo:paragraph-rsid="002d0c9b"/>
    </style:style>
    <style:style style:name="P34" style:family="paragraph" style:parent-style-name="Standard" style:list-style-name="L7">
      <style:text-properties officeooo:rsid="001849cb" officeooo:paragraph-rsid="002d0c9b"/>
    </style:style>
    <style:style style:name="P35" style:family="paragraph" style:parent-style-name="Standard">
      <style:text-properties officeooo:rsid="001849cb" officeooo:paragraph-rsid="002b45ce"/>
    </style:style>
    <style:style style:name="P36" style:family="paragraph" style:parent-style-name="Standard">
      <style:text-properties officeooo:rsid="001da1bc" officeooo:paragraph-rsid="002e7d9c"/>
    </style:style>
    <style:style style:name="P37" style:family="paragraph" style:parent-style-name="Standard">
      <style:text-properties officeooo:rsid="00290227" officeooo:paragraph-rsid="0030a153"/>
    </style:style>
    <style:style style:name="P38" style:family="paragraph" style:parent-style-name="Standard">
      <style:text-properties fo:font-size="8pt" officeooo:paragraph-rsid="002e7d9c" style:font-size-asian="8pt" style:font-size-complex="8pt"/>
    </style:style>
    <style:style style:name="P39" style:family="paragraph" style:parent-style-name="Standard">
      <style:text-properties fo:font-size="8pt" officeooo:paragraph-rsid="0030a153" style:font-size-asian="8pt" style:font-size-complex="8pt"/>
    </style:style>
    <style:style style:name="P40"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41" style:family="paragraph" style:parent-style-name="Standard">
      <style:text-properties officeooo:rsid="001849cb" officeooo:paragraph-rsid="0031c8cf"/>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style:text-underline-style="solid" style:text-underline-width="auto" style:text-underline-color="font-color" officeooo:rsid="001c23e2"/>
    </style:style>
    <style:style style:name="T9" style:family="text">
      <style:text-properties style:text-underline-style="solid" style:text-underline-width="auto" style:text-underline-color="font-color"/>
    </style:style>
    <style:style style:name="T10" style:family="text">
      <style:text-properties officeooo:rsid="001849cb"/>
    </style:style>
    <style:style style:name="T11" style:family="text">
      <style:text-properties officeooo:rsid="00272ab0"/>
    </style:style>
    <style:style style:name="T12" style:family="text">
      <style:text-properties officeooo:rsid="0027af3e"/>
    </style:style>
    <style:style style:name="T13" style:family="text">
      <style:text-properties officeooo:rsid="0014c4e0"/>
    </style:style>
    <style:style style:name="T14" style:family="text">
      <style:text-properties officeooo:rsid="00168cc1"/>
    </style:style>
    <style:style style:name="T15" style:family="text">
      <style:text-properties officeooo:rsid="00290227"/>
    </style:style>
    <style:style style:name="T16" style:family="text">
      <style:text-properties officeooo:rsid="0029ebe6"/>
    </style:style>
    <style:style style:name="T17" style:family="text">
      <style:text-properties style:text-underline-style="solid" style:text-underline-width="auto" style:text-underline-color="font-color" fo:font-weight="bold" officeooo:rsid="002b45ce"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officeooo:rsid="002c8cf2" style:font-style-asian="italic" style:font-style-complex="italic"/>
    </style:style>
    <style:style style:name="T20" style:family="text">
      <style:text-properties officeooo:rsid="002c8cf2"/>
    </style:style>
    <style:style style:name="T21" style:family="text">
      <style:text-properties officeooo:rsid="002d0c9b"/>
    </style:style>
    <style:style style:name="T22" style:family="text">
      <style:text-properties officeooo:rsid="003021ee"/>
    </style:style>
    <style:style style:name="T23" style:family="text">
      <style:text-properties fo:background-color="transparent" loext:char-shading-value="0"/>
    </style:style>
    <style:style style:name="T24" style:family="text">
      <style:text-properties officeooo:rsid="0030a153"/>
    </style:style>
    <style:style style:name="T25" style:family="text">
      <style:text-properties officeooo:rsid="002b45ce" fo:background-color="transparent" loext:char-shading-value="0"/>
    </style:style>
    <style:style style:name="T26" style:family="text">
      <style:text-properties officeooo:rsid="001d7660"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eme bootswatch superhero <text:a xlink:type="simple" xlink:href="https://bootswatch.com/superhero/" text:style-name="Internet_20_link" text:visited-style-name="Visited_20_Internet_20_Link">https://bootswatch.com/superhero/</text:a> pour le design.</text:p>
      <text:p text:style-name="P12"/>
      <text:p text:style-name="P14"><text:span text:style-name="T8">2</text:span><text:span text:style-name="T9">) Connexion/Enregistrement</text:span></text:p>
      <text:p text:style-name="P2"/>
      <text:p text:style-name="P15">Connexion</text:p>
      <text:p text:style-name="P2">L’authentif<text:span text:style-name="T10">i</text:span>cation se fait <text:span text:style-name="T6">avec</text:span> l’entité User : email + mot de passe</text:p>
      <text:p text:style-name="P16"><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15"><text:soft-page-break/>Enregistrement</text:p>
      <text:p text:style-name="P2">L’enregistrement se fait avec une vérification par email <text:span text:style-name="T11">envoyée par </text:span><text:a xlink:type="simple" xlink:href="mailto:contact@esprit-deco.fr" text:style-name="Internet_20_link" text:visited-style-name="Visited_20_Internet_20_Link"><text:span text:style-name="T11">contact@esprit-deco.fr</text:span></text:a><text:span text:style-name="T11"> </text:span><text:span text:style-name="T12">(Service Esprit Déco)</text:span>.</text:p>
      <text:list text:style-name="L3">
        <text:list-header>
          <text:p text:style-name="P17"><text:span text:style-name="T13">⚠️ </text:span><text:span text:style-name="T14">Pour l’envoi d’email, </text:span><text:span text:style-name="T13">sélectionner la bonne option lors du wizard du make:registration-form <text:s/>et bien lire les instructions à réaliser à la fin du wizard.</text:span></text:p>
        </text:list-header>
      </text:list>
      <text:p text:style-name="P18"/>
      <text:p text:style-name="P18"><text:span text:style-name="T10">Une case à cocher « j’accepte les condition générale » avec un lien de téléchargement </text:span><text:span text:style-name="T1">des conditions générales de vente (cgv.pdf dans le dossier projet).</text:span></text:p>
      <text:p text:style-name="P18"/>
      <text:p text:style-name="P19"><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18">💪 Mot de passe : <text:span text:style-name="T13">12 caractère minimum avec au moins 1 majuscule, 1 minuscule, 1 nombre et 1 caractère spécial.</text:span></text:p>
      <text:p text:style-name="P20"/>
      <text:p text:style-name="P20">💪 <text:span text:style-name="T15">Faire une UserFixtures pour créer un user </text:span>avec le rôle ROLE_ADMIN:</text:p>
      <text:list xml:id="list3701634895" text:style-name="L4">
        <text:list-item>
          <text:p text:style-name="P21">admin@esprit-deco.fr</text:p>
        </text:list-item>
        <text:list-item>
          <text:p text:style-name="P21">admin</text:p>
        </text:list-item>
      </text:list>
      <text:p text:style-name="P20"><text:span text:style-name="T15">Et un user avec le rôle</text:span> ROLE_USER :</text:p>
      <text:list text:style-name="L5">
        <text:list-item>
          <text:p text:style-name="P22">toto@gmail.com</text:p>
        </text:list-item>
        <text:list-item>
          <text:p text:style-name="P22">pass</text:p>
        </text:list-item>
      </text:list>
      <text:p text:style-name="P23"/>
      <text:p text:style-name="P23">S<text:span text:style-name="T16">ans fixture, </text:span>charger directement les données avec l<text:span text:style-name="T16">es</text:span> requête<text:span text:style-name="T16">s</text:span> SQL :</text:p>
      <text:p text:style-name="P24">--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20"/>
      <text:p text:style-name="P25"><text:span text:style-name="T17">3) </text:span><text:span text:style-name="T18">Catalogue de produits</text:span></text:p>
      <text:p text:style-name="P26"/>
      <text:p text:style-name="P26">L’affichage de tous les produit constitue la page d’accueil du site.</text:p>
      <text:p text:style-name="P26"><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26"/>
      <text:p text:style-name="P26"/>
      <text:p text:style-name="P27">MCD :</text:p>
      <text:p text:style-name="P28">Image (1,1) --- <text:span text:style-name="T19">représente</text:span> --- (0,N) Product (1,1) --- <text:span text:style-name="T19">appartient</text:span> --- <text:span text:style-name="T20">(0,N) </text:span>Category</text:p>
      <text:list text:style-name="L6">
        <text:list-item>
          <text:p text:style-name="P29">Produit : id (int auto-increment), title (string, 255), descritpion (text), price (float), category (ManyToOne), images (OneToMany).</text:p>
        </text:list-item>
        <text:list-item>
          <text:p text:style-name="P30">Category : id (int auto-increment), name (string, 255), <text:span text:style-name="T21">color</text:span> (string, 255), products (OneToMany).</text:p>
        </text:list-item>
        <text:list-item>
          <text:p text:style-name="P29">Image : id (int auto-increment), path (string, 255), alt (string, 255), <text:span text:style-name="T22">isPrincipal (bool), </text:span>product (ManyToOne).</text:p>
        </text:list-item>
      </text:list>
      <text:p text:style-name="P31"/>
      <text:p text:style-name="P32">💪 <text:span text:style-name="T15">Faire une </text:span><text:span text:style-name="T21">Category</text:span><text:span text:style-name="T15">Fixtures, </text:span><text:span text:style-name="T21">ImageFixtures et ProductFixtures qui utilise PhpFaker </text:span><text:span text:style-name="T15">pour créer un user </text:span>avec le rôle ROLE_ADMIN:</text:p>
      <text:list text:continue-list="list3701634895" text:style-name="L4">
        <text:list-item>
          <text:p text:style-name="P33">admin@esprit-deco.fr</text:p>
        </text:list-item>
        <text:list-item>
          <text:p text:style-name="P33">admin</text:p>
        </text:list-item>
      </text:list>
      <text:p text:style-name="P32"><text:span text:style-name="T15">Et un user avec le rôle</text:span> ROLE_USER :</text:p>
      <text:list text:style-name="L7">
        <text:list-item>
          <text:p text:style-name="P34">toto@gmail.com</text:p>
        </text:list-item>
        <text:list-item>
          <text:p text:style-name="P34">pass</text:p>
        </text:list-item>
      </text:list>
      <text:p text:style-name="P31"/>
      <text:p text:style-name="P31"/>
      <text:p text:style-name="P35"><text:span text:style-name="T23"/></text:p>
      <text:p text:style-name="P36">Catégorie</text:p>
      <text:p text:style-name="P36">Textile, Lumière, Mural, Décor, Pratique</text:p>
      <text:p text:style-name="P37">S<text:span text:style-name="T16">ans fixture, </text:span>charger directement les données avec l<text:span text:style-name="T16">es</text:span> requête<text:span text:style-name="T16">s</text:span> SQL :</text:p>
      <text:p text:style-name="P37"/>
      <text:p text:style-name="P38">INSERT INTO category (name) VALUES ('Textile'), ('Lumière'), ('Mural'), ('Décor'), ('Pratique');</text:p>
      <text:p text:style-name="P38"/>
      <text:p text:style-name="P38">INSERT INTO product (title, description, price, category_id) VALUES</text:p>
      <text:p text:style-name="P38">-- Textile (1)</text:p>
      <text:p text:style-name="P38">('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38"><text:soft-page-break/>('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38">('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38">('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38">-- Lumière (2)</text:p>
      <text:p text:style-name="P38">('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38">('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de plafond et configurations d’espace. Cette suspension est parfaite pour créer une ambiance élégante et lumineuse tout en affirmant votre style décoratif.', 89.99, 2),</text:p>
      <text:p text:style-name="P38">('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38">('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38">-- Mural (3)</text:p>
      <text:p text:style-name="P38">('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38">('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38">('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38">('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38">-- Décor (4)</text:p>
      <text:p text:style-name="P38">('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38">('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38">('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38">('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38">-- Pratique (5)</text:p>
      <text:p text:style-name="P38">('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text:soft-page-break/>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38">('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38">('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38">('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38"/>
      <text:p text:style-name="P38">INSERT INTO image (path, alt, product_id, <text:span text:style-name="T24">is_principal</text:span>) VALUES</text:p>
      <text:p text:style-name="P38">-- Textile (1 à 4)</text:p>
      <text:p text:style-name="P38">('images/product/image1.webp', 'Coussin bohème', 1, <text:span text:style-name="T24">1</text:span>),</text:p>
      <text:p text:style-name="P39">('images/product/image2.webp', 'Plaid doux', 2, <text:span text:style-name="T24">1</text:span>),</text:p>
      <text:p text:style-name="P39">('images/product/image3.webp', 'Rideaux en lin', 3, <text:span text:style-name="T24">1</text:span>),</text:p>
      <text:p text:style-name="P39">('images/product/image4.webp', 'Tapis berbère', 4, <text:span text:style-name="T24">1</text:span>),</text:p>
      <text:p text:style-name="P38">-- Lumière (5 à 8)</text:p>
      <text:p text:style-name="P39">('images/product/image5.webp', 'Lampe de chevet', 5, <text:span text:style-name="T24">1</text:span>),</text:p>
      <text:p text:style-name="P39">('images/product/image6.webp', 'Suspension design', 6, <text:span text:style-name="T24">1</text:span>),</text:p>
      <text:p text:style-name="P39">('images/product/image7.webp', 'Guirlande LED', 7, <text:span text:style-name="T24">1</text:span>),</text:p>
      <text:p text:style-name="P39">('images/product/image8.webp', 'Lampe sur pied', 8, <text:span text:style-name="T24">1</text:span>),</text:p>
      <text:p text:style-name="P38">-- Mural (9 à 12)</text:p>
      <text:p text:style-name="P39">('images/product/image9.webp', 'Tableau abstrait', 9, <text:span text:style-name="T24">1</text:span>),</text:p>
      <text:p text:style-name="P39">('images/product/image10.webp', 'Miroir rond', 10, <text:span text:style-name="T24">1</text:span>),</text:p>
      <text:p text:style-name="P39">('images/product/image11.webp', 'Affiche vintage', 11, <text:span text:style-name="T24">1</text:span>),</text:p>
      <text:p text:style-name="P39">('images/product/image12.webp', 'Horloge murale', 12, <text:span text:style-name="T24">1</text:span>),</text:p>
      <text:p text:style-name="P38">-- Décor (13 à 16)</text:p>
      <text:p text:style-name="P39">('images/product/image13.webp', 'Vase en céramique', 13, <text:span text:style-name="T24">1</text:span>),</text:p>
      <text:p text:style-name="P39">('images/product/image14.webp', 'Bougie parfumée', 14, <text:span text:style-name="T24">1</text:span>),</text:p>
      <text:p text:style-name="P39">('images/product/image15.webp', 'Statue déco', 15, <text:span text:style-name="T24">1</text:span>),</text:p>
      <text:p text:style-name="P39">('images/product/image16.webp', 'Plante artificielle', 16, <text:span text:style-name="T24">1</text:span>),</text:p>
      <text:p text:style-name="P38">-- Pratique (17 à 20)</text:p>
      <text:p text:style-name="P39">('images/product/image17.webp', 'Panier de rangement', 17, <text:span text:style-name="T24">1</text:span>),</text:p>
      <text:p text:style-name="P39">('images/product/image18.webp', 'Boîte de stockage', 18, <text:span text:style-name="T24">1</text:span>),</text:p>
      <text:p text:style-name="P39">('images/product/image19.webp', 'Porte-manteau', 19, <text:span text:style-name="T24">1</text:span>),</text:p>
      <text:p text:style-name="P39">('images/product/image20.webp', 'Étagère murale', 20, <text:span text:style-name="T24">1</text:span>);</text:p>
      <text:p text:style-name="P38"/>
      <text:p text:style-name="P40"><text:span text:style-name="T25">4) </text:span><text:span text:style-name="T26">F</text:span><text:span text:style-name="T23">iche produit</text:span></text:p>
      <text:p text:style-name="P41"/>
      <text:p text:style-name="P4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8T14:15:46.960459047</dc:date>
    <meta:editing-duration>PT3H28M39S</meta:editing-duration>
    <meta:editing-cycles>18</meta:editing-cycles>
    <meta:generator>LibreOffice/26.2.2.2$Linux_X86_64 LibreOffice_project/620$Build-2</meta:generator>
    <meta:document-statistic meta:table-count="0" meta:image-count="5" meta:object-count="0" meta:page-count="5" meta:paragraph-count="100" meta:word-count="2427" meta:character-count="16652" meta:non-whitespace-character-count="14341"/>
  </office:meta>
</office:document-meta>
</file>